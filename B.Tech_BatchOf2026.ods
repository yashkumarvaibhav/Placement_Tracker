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float" office:value="2020496" calcext:value-type="float">
            <text:p>2020496</text:p>
          </table:table-cell>
          <table:table-cell office:value-type="string" calcext:value-type="string">
            <text:p>ANUSHKA PANWAR</text:p>
          </table:table-cell>
          <table:table-cell office:value-type="string" calcext:value-type="string">
            <text:p>CSB</text:p>
          </table:table-cell>
        </table:table-row>
        <table:table-row table:style-name="ro2">
          <table:table-cell office:value-type="float" office:value="2021173" calcext:value-type="float">
            <text:p>2021173</text:p>
          </table:table-cell>
          <table:table-cell office:value-type="string" calcext:value-type="string">
            <text:p>NIKHIL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1194" calcext:value-type="float">
            <text:p>2021194</text:p>
          </table:table-cell>
          <table:table-cell office:value-type="string" calcext:value-type="string">
            <text:p>SAINSH MATTOO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1269" calcext:value-type="float">
            <text:p>2021269</text:p>
          </table:table-cell>
          <table:table-cell office:value-type="string" calcext:value-type="string">
            <text:p>OJUS CHUGH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1300" calcext:value-type="float">
            <text:p>2021300</text:p>
          </table:table-cell>
          <table:table-cell office:value-type="string" calcext:value-type="string">
            <text:p>VISHUL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1426" calcext:value-type="float">
            <text:p>2021426</text:p>
          </table:table-cell>
          <table:table-cell office:value-type="string" calcext:value-type="string">
            <text:p>SRUJAL SAU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01" calcext:value-type="float">
            <text:p>2022001</text:p>
          </table:table-cell>
          <table:table-cell office:value-type="string" calcext:value-type="string">
            <text:p>AAHAN PIPLANI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04" calcext:value-type="float">
            <text:p>2022004</text:p>
          </table:table-cell>
          <table:table-cell office:value-type="string" calcext:value-type="string">
            <text:p>AARADHYA VERM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05" calcext:value-type="float">
            <text:p>2022005</text:p>
          </table:table-cell>
          <table:table-cell office:value-type="string" calcext:value-type="string">
            <text:p>AARAV MATHUR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06" calcext:value-type="float">
            <text:p>2022006</text:p>
          </table:table-cell>
          <table:table-cell office:value-type="string" calcext:value-type="string">
            <text:p>AARYA GUPT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009" calcext:value-type="float">
            <text:p>2022009</text:p>
          </table:table-cell>
          <table:table-cell office:value-type="string" calcext:value-type="string">
            <text:p>AASTHA SINGH</text:p>
          </table:table-cell>
          <table:table-cell office:value-type="string" calcext:value-type="string">
            <text:p>CSSS</text:p>
          </table:table-cell>
        </table:table-row>
        <table:table-row table:style-name="ro3">
          <table:table-cell office:value-type="float" office:value="2022007" calcext:value-type="float">
            <text:p>2022007</text:p>
          </table:table-cell>
          <table:table-cell office:value-type="string" calcext:value-type="string">
            <text:p>AARYA KHANDEL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10" calcext:value-type="float">
            <text:p>2022010</text:p>
          </table:table-cell>
          <table:table-cell office:value-type="string" calcext:value-type="string">
            <text:p>AAYU SINGH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11" calcext:value-type="float">
            <text:p>2022011</text:p>
          </table:table-cell>
          <table:table-cell office:value-type="string" calcext:value-type="string">
            <text:p>AAYUSH MISHR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12" calcext:value-type="float">
            <text:p>2022012</text:p>
          </table:table-cell>
          <table:table-cell office:value-type="string" calcext:value-type="string">
            <text:p>ABBAS MURTAZ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013" calcext:value-type="float">
            <text:p>2022013</text:p>
          </table:table-cell>
          <table:table-cell office:value-type="string" calcext:value-type="string">
            <text:p>ABDULLAH SHUJAT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014" calcext:value-type="float">
            <text:p>2022014</text:p>
          </table:table-cell>
          <table:table-cell office:value-type="string" calcext:value-type="string">
            <text:p>ABHAY DAGA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15" calcext:value-type="float">
            <text:p>2022015</text:p>
          </table:table-cell>
          <table:table-cell office:value-type="string" calcext:value-type="string">
            <text:p>ABHAY KOHLI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16" calcext:value-type="float">
            <text:p>2022016</text:p>
          </table:table-cell>
          <table:table-cell office:value-type="string" calcext:value-type="string">
            <text:p>ABHAY SINGHA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17" calcext:value-type="float">
            <text:p>2022017</text:p>
          </table:table-cell>
          <table:table-cell office:value-type="string" calcext:value-type="string">
            <text:p>ABHIJEET CHAUHAN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018" calcext:value-type="float">
            <text:p>2022018</text:p>
          </table:table-cell>
          <table:table-cell office:value-type="string" calcext:value-type="string">
            <text:p>ABHINAV KUMAR SAXENA</text:p>
          </table:table-cell>
          <table:table-cell office:value-type="string" calcext:value-type="string">
            <text:p>ECE</text:p>
          </table:table-cell>
        </table:table-row>
        <table:table-row table:style-name="ro2">
          <table:table-cell office:value-type="float" office:value="2022020" calcext:value-type="float">
            <text:p>2022020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CSSS</text:p>
          </table:table-cell>
        </table:table-row>
        <table:table-row table:style-name="ro3">
          <table:table-cell office:value-type="float" office:value="2022003" calcext:value-type="float">
            <text:p>2022003</text:p>
          </table:table-cell>
          <table:table-cell office:value-type="string" calcext:value-type="string">
            <text:p>AAKARSH YOHAAN RAV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19" calcext:value-type="float">
            <text:p>2022019</text:p>
          </table:table-cell>
          <table:table-cell office:value-type="string" calcext:value-type="string">
            <text:p>ABHIRUP DAS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22" calcext:value-type="float">
            <text:p>2022022</text:p>
          </table:table-cell>
          <table:table-cell office:value-type="string" calcext:value-type="string">
            <text:p>ABHISHEK BENIWAL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23" calcext:value-type="float">
            <text:p>2022023</text:p>
          </table:table-cell>
          <table:table-cell office:value-type="string" calcext:value-type="string">
            <text:p>ABHISHEK JH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24" calcext:value-type="float">
            <text:p>2022024</text:p>
          </table:table-cell>
          <table:table-cell office:value-type="string" calcext:value-type="string">
            <text:p>ADARSH JH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25" calcext:value-type="float">
            <text:p>2022025</text:p>
          </table:table-cell>
          <table:table-cell office:value-type="string" calcext:value-type="string">
            <text:p>ADITI SHARM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26" calcext:value-type="float">
            <text:p>2022026</text:p>
          </table:table-cell>
          <table:table-cell office:value-type="string" calcext:value-type="string">
            <text:p>ADITI SRIVASTAV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027" calcext:value-type="float">
            <text:p>2022027</text:p>
          </table:table-cell>
          <table:table-cell office:value-type="string" calcext:value-type="string">
            <text:p>ADITRI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028" calcext:value-type="float">
            <text:p>2022028</text:p>
          </table:table-cell>
          <table:table-cell office:value-type="string" calcext:value-type="string">
            <text:p>ADITYA AGGARWA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29" calcext:value-type="float">
            <text:p>2022029</text:p>
          </table:table-cell>
          <table:table-cell office:value-type="string" calcext:value-type="string">
            <text:p>ADITYA BAGRI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008" calcext:value-type="float">
            <text:p>2022008</text:p>
          </table:table-cell>
          <table:table-cell office:value-type="string" calcext:value-type="string">
            <text:p>AARZOO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21" calcext:value-type="float">
            <text:p>2022021</text:p>
          </table:table-cell>
          <table:table-cell office:value-type="string" calcext:value-type="string">
            <text:p>ABHISHEK BANS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33" calcext:value-type="float">
            <text:p>2022033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30" calcext:value-type="float">
            <text:p>2022030</text:p>
          </table:table-cell>
          <table:table-cell office:value-type="string" calcext:value-type="string">
            <text:p>ADITYA DIXIT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32" calcext:value-type="float">
            <text:p>2022032</text:p>
          </table:table-cell>
          <table:table-cell office:value-type="string" calcext:value-type="string">
            <text:p>ADITYA JAGADALE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37" calcext:value-type="float">
            <text:p>2022037</text:p>
          </table:table-cell>
          <table:table-cell office:value-type="string" calcext:value-type="string">
            <text:p>ADITYA RAJ JAIN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38" calcext:value-type="float">
            <text:p>2022038</text:p>
          </table:table-cell>
          <table:table-cell office:value-type="string" calcext:value-type="string">
            <text:p>ADITYA SHARM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35" calcext:value-type="float">
            <text:p>2022035</text:p>
          </table:table-cell>
          <table:table-cell office:value-type="string" calcext:value-type="string">
            <text:p>ADITYA MOZ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36" calcext:value-type="float">
            <text:p>2022036</text:p>
          </table:table-cell>
          <table:table-cell office:value-type="string" calcext:value-type="string">
            <text:p>ADITYA PRASAD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039" calcext:value-type="float">
            <text:p>2022039</text:p>
          </table:table-cell>
          <table:table-cell office:value-type="string" calcext:value-type="string">
            <text:p>ADITYA SINGH YAD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040" calcext:value-type="float">
            <text:p>2022040</text:p>
          </table:table-cell>
          <table:table-cell office:value-type="string" calcext:value-type="string">
            <text:p>ADITYA UPADHYAY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41" calcext:value-type="float">
            <text:p>2022041</text:p>
          </table:table-cell>
          <table:table-cell office:value-type="string" calcext:value-type="string">
            <text:p>ADITYA YAD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042" calcext:value-type="float">
            <text:p>2022042</text:p>
          </table:table-cell>
          <table:table-cell office:value-type="string" calcext:value-type="string">
            <text:p>ADVIK SHARM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43" calcext:value-type="float">
            <text:p>2022043</text:p>
          </table:table-cell>
          <table:table-cell office:value-type="string" calcext:value-type="string">
            <text:p>ADYA AGGARWAL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044" calcext:value-type="float">
            <text:p>2022044</text:p>
          </table:table-cell>
          <table:table-cell office:value-type="string" calcext:value-type="string">
            <text:p>AGRANEY TRIPATHI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046" calcext:value-type="float">
            <text:p>2022046</text:p>
          </table:table-cell>
          <table:table-cell office:value-type="string" calcext:value-type="string">
            <text:p>AKANKSH SEMAR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047" calcext:value-type="float">
            <text:p>2022047</text:p>
          </table:table-cell>
          <table:table-cell office:value-type="string" calcext:value-type="string">
            <text:p>AKANSH GUPT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48" calcext:value-type="float">
            <text:p>2022048</text:p>
          </table:table-cell>
          <table:table-cell office:value-type="string" calcext:value-type="string">
            <text:p>AKASH KUM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49" calcext:value-type="float">
            <text:p>2022049</text:p>
          </table:table-cell>
          <table:table-cell office:value-type="string" calcext:value-type="string">
            <text:p>AKSHANSH ASTY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51" calcext:value-type="float">
            <text:p>2022051</text:p>
          </table:table-cell>
          <table:table-cell office:value-type="string" calcext:value-type="string">
            <text:p>AKSHAT GIAN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052" calcext:value-type="float">
            <text:p>2022052</text:p>
          </table:table-cell>
          <table:table-cell office:value-type="string" calcext:value-type="string">
            <text:p>AKSHAT KARNWAL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050" calcext:value-type="float">
            <text:p>2022050</text:p>
          </table:table-cell>
          <table:table-cell office:value-type="string" calcext:value-type="string">
            <text:p>AKSHAT CHAW PARMA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53" calcext:value-type="float">
            <text:p>2022053</text:p>
          </table:table-cell>
          <table:table-cell office:value-type="string" calcext:value-type="string">
            <text:p>AKSHAT KOTHARI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31" calcext:value-type="float">
            <text:p>2022031</text:p>
          </table:table-cell>
          <table:table-cell office:value-type="string" calcext:value-type="string">
            <text:p>ADITYA GUPTA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034" calcext:value-type="float">
            <text:p>2022034</text:p>
          </table:table-cell>
          <table:table-cell office:value-type="string" calcext:value-type="string">
            <text:p>ADITYA KUMAR SINH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56" calcext:value-type="float">
            <text:p>2022056</text:p>
          </table:table-cell>
          <table:table-cell office:value-type="string" calcext:value-type="string">
            <text:p>AKSHAT TOKAS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054" calcext:value-type="float">
            <text:p>2022054</text:p>
          </table:table-cell>
          <table:table-cell office:value-type="string" calcext:value-type="string">
            <text:p>AKSHAT RAJ SAXEN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55" calcext:value-type="float">
            <text:p>2022055</text:p>
          </table:table-cell>
          <table:table-cell office:value-type="string" calcext:value-type="string">
            <text:p>AKSHAT SAXEN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57" calcext:value-type="float">
            <text:p>2022057</text:p>
          </table:table-cell>
          <table:table-cell office:value-type="string" calcext:value-type="string">
            <text:p>AKSHAT WADHER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60" calcext:value-type="float">
            <text:p>2022060</text:p>
          </table:table-cell>
          <table:table-cell office:value-type="string" calcext:value-type="string">
            <text:p>AMAN KUMAR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58" calcext:value-type="float">
            <text:p>2022058</text:p>
          </table:table-cell>
          <table:table-cell office:value-type="string" calcext:value-type="string">
            <text:p>AKSHIT GUPT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62" calcext:value-type="float">
            <text:p>2022062</text:p>
          </table:table-cell>
          <table:table-cell office:value-type="string" calcext:value-type="string">
            <text:p>AMARTYA SINGH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59" calcext:value-type="float">
            <text:p>2022059</text:p>
          </table:table-cell>
          <table:table-cell office:value-type="string" calcext:value-type="string">
            <text:p>ALOK SINH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64" calcext:value-type="float">
            <text:p>2022064</text:p>
          </table:table-cell>
          <table:table-cell office:value-type="string" calcext:value-type="string">
            <text:p>AMIT KUM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061" calcext:value-type="float">
            <text:p>2022061</text:p>
          </table:table-cell>
          <table:table-cell office:value-type="string" calcext:value-type="string">
            <text:p>AMAN TO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66" calcext:value-type="float">
            <text:p>2022066</text:p>
          </table:table-cell>
          <table:table-cell office:value-type="string" calcext:value-type="string">
            <text:p>ANANT GOSWAMI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067" calcext:value-type="float">
            <text:p>2022067</text:p>
          </table:table-cell>
          <table:table-cell office:value-type="string" calcext:value-type="string">
            <text:p>ANANT KUMAR KAUSHAL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68" calcext:value-type="float">
            <text:p>2022068</text:p>
          </table:table-cell>
          <table:table-cell office:value-type="string" calcext:value-type="string">
            <text:p>ANANYA GARG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69" calcext:value-type="float">
            <text:p>2022069</text:p>
          </table:table-cell>
          <table:table-cell office:value-type="string" calcext:value-type="string">
            <text:p>ANANYA SACHDEV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70" calcext:value-type="float">
            <text:p>2022070</text:p>
          </table:table-cell>
          <table:table-cell office:value-type="string" calcext:value-type="string">
            <text:p>ANGAD SINGH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63" calcext:value-type="float">
            <text:p>2022063</text:p>
          </table:table-cell>
          <table:table-cell office:value-type="string" calcext:value-type="string">
            <text:p>AMIT BENI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72" calcext:value-type="float">
            <text:p>2022072</text:p>
          </table:table-cell>
          <table:table-cell office:value-type="string" calcext:value-type="string">
            <text:p>ANIKAIT AGRAWA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73" calcext:value-type="float">
            <text:p>2022073</text:p>
          </table:table-cell>
          <table:table-cell office:value-type="string" calcext:value-type="string">
            <text:p>ANIKET GUPT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74" calcext:value-type="float">
            <text:p>2022074</text:p>
          </table:table-cell>
          <table:table-cell office:value-type="string" calcext:value-type="string">
            <text:p>ANIMESH GUPT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65" calcext:value-type="float">
            <text:p>2022065</text:p>
          </table:table-cell>
          <table:table-cell office:value-type="string" calcext:value-type="string">
            <text:p>ANANT GARG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076" calcext:value-type="float">
            <text:p>2022076</text:p>
          </table:table-cell>
          <table:table-cell office:value-type="string" calcext:value-type="string">
            <text:p>ANISH BERA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077" calcext:value-type="float">
            <text:p>2022077</text:p>
          </table:table-cell>
          <table:table-cell office:value-type="string" calcext:value-type="string">
            <text:p>ANISH JAIN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081" calcext:value-type="float">
            <text:p>2022081</text:p>
          </table:table-cell>
          <table:table-cell office:value-type="string" calcext:value-type="string">
            <text:p>ANMOL ADARSH KUMAR</text:p>
          </table:table-cell>
          <table:table-cell office:value-type="string" calcext:value-type="string">
            <text:p>CSAM</text:p>
          </table:table-cell>
        </table:table-row>
        <table:table-row table:style-name="ro4">
          <table:table-cell office:value-type="float" office:value="2022078" calcext:value-type="float">
            <text:p>2022078</text:p>
          </table:table-cell>
          <table:table-cell office:value-type="string" calcext:value-type="string">
            <text:p>ANISHA PRASHANT BOPARDIK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079" calcext:value-type="float">
            <text:p>2022079</text:p>
          </table:table-cell>
          <table:table-cell office:value-type="string" calcext:value-type="string">
            <text:p>ANKUR BOHR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82" calcext:value-type="float">
            <text:p>2022082</text:p>
          </table:table-cell>
          <table:table-cell office:value-type="string" calcext:value-type="string">
            <text:p>ANNIKA SINH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083" calcext:value-type="float">
            <text:p>2022083</text:p>
          </table:table-cell>
          <table:table-cell office:value-type="string" calcext:value-type="string">
            <text:p>ANSH VARSHNEY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84" calcext:value-type="float">
            <text:p>2022084</text:p>
          </table:table-cell>
          <table:table-cell office:value-type="string" calcext:value-type="string">
            <text:p>ANURAG RAI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071" calcext:value-type="float">
            <text:p>2022071</text:p>
          </table:table-cell>
          <table:table-cell office:value-type="string" calcext:value-type="string">
            <text:p>ANGADJEET SINGH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87" calcext:value-type="float">
            <text:p>2022087</text:p>
          </table:table-cell>
          <table:table-cell office:value-type="string" calcext:value-type="string">
            <text:p>ANVESHA JAIN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085" calcext:value-type="float">
            <text:p>2022085</text:p>
          </table:table-cell>
          <table:table-cell office:value-type="string" calcext:value-type="string">
            <text:p>ANUSHKA KORLAPATI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088" calcext:value-type="float">
            <text:p>2022088</text:p>
          </table:table-cell>
          <table:table-cell office:value-type="string" calcext:value-type="string">
            <text:p>ANYA HOODA</text:p>
          </table:table-cell>
          <table:table-cell office:value-type="string" calcext:value-type="string">
            <text:p>CSSS</text:p>
          </table:table-cell>
        </table:table-row>
        <table:table-row table:style-name="ro2">
          <table:table-cell office:value-type="float" office:value="2022075" calcext:value-type="float">
            <text:p>2022075</text:p>
          </table:table-cell>
          <table:table-cell office:value-type="string" calcext:value-type="string">
            <text:p>ANISH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086" calcext:value-type="float">
            <text:p>2022086</text:p>
          </table:table-cell>
          <table:table-cell office:value-type="string" calcext:value-type="string">
            <text:p>ANUSHKA SRIVASTAV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93" calcext:value-type="float">
            <text:p>2022093</text:p>
          </table:table-cell>
          <table:table-cell office:value-type="string" calcext:value-type="string">
            <text:p>ARHAAN BAHADUR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090" calcext:value-type="float">
            <text:p>2022090</text:p>
          </table:table-cell>
          <table:table-cell office:value-type="string" calcext:value-type="string">
            <text:p>ARAAV BHARDWAJ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94" calcext:value-type="float">
            <text:p>2022094</text:p>
          </table:table-cell>
          <table:table-cell office:value-type="string" calcext:value-type="string">
            <text:p>ARJUN BAIRVA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092" calcext:value-type="float">
            <text:p>2022092</text:p>
          </table:table-cell>
          <table:table-cell office:value-type="string" calcext:value-type="string">
            <text:p>AREEN RAJESH GANJOO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095" calcext:value-type="float">
            <text:p>2022095</text:p>
          </table:table-cell>
          <table:table-cell office:value-type="string" calcext:value-type="string">
            <text:p>ARJUN TANDON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97" calcext:value-type="float">
            <text:p>2022097</text:p>
          </table:table-cell>
          <table:table-cell office:value-type="string" calcext:value-type="string">
            <text:p>ARNAV AGRAWA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098" calcext:value-type="float">
            <text:p>2022098</text:p>
          </table:table-cell>
          <table:table-cell office:value-type="string" calcext:value-type="string">
            <text:p>ARNAV BATRA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096" calcext:value-type="float">
            <text:p>2022096</text:p>
          </table:table-cell>
          <table:table-cell office:value-type="string" calcext:value-type="string">
            <text:p>ARMAAN SINGH (INDIAN)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099" calcext:value-type="float">
            <text:p>2022099</text:p>
          </table:table-cell>
          <table:table-cell office:value-type="string" calcext:value-type="string">
            <text:p>ARNAV DIXIT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00" calcext:value-type="float">
            <text:p>2022100</text:p>
          </table:table-cell>
          <table:table-cell office:value-type="string" calcext:value-type="string">
            <text:p>ARNAV GUPT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01" calcext:value-type="float">
            <text:p>2022101</text:p>
          </table:table-cell>
          <table:table-cell office:value-type="string" calcext:value-type="string">
            <text:p>ARNAV JINDAL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089" calcext:value-type="float">
            <text:p>2022089</text:p>
          </table:table-cell>
          <table:table-cell office:value-type="string" calcext:value-type="string">
            <text:p>APA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03" calcext:value-type="float">
            <text:p>2022103</text:p>
          </table:table-cell>
          <table:table-cell office:value-type="string" calcext:value-type="string">
            <text:p>ARNAV SHUKLA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104" calcext:value-type="float">
            <text:p>2022104</text:p>
          </table:table-cell>
          <table:table-cell office:value-type="string" calcext:value-type="string">
            <text:p>ARNAV SRIVASTAV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05" calcext:value-type="float">
            <text:p>2022105</text:p>
          </table:table-cell>
          <table:table-cell office:value-type="string" calcext:value-type="string">
            <text:p>ARPAN VERMA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106" calcext:value-type="float">
            <text:p>2022106</text:p>
          </table:table-cell>
          <table:table-cell office:value-type="string" calcext:value-type="string">
            <text:p>ARUN SINGH RAWAT</text:p>
          </table:table-cell>
          <table:table-cell office:value-type="string" calcext:value-type="string">
            <text:p>CSSS</text:p>
          </table:table-cell>
        </table:table-row>
        <table:table-row table:style-name="ro2">
          <table:table-cell office:value-type="float" office:value="2022109" calcext:value-type="float">
            <text:p>2022109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10" calcext:value-type="float">
            <text:p>2022110</text:p>
          </table:table-cell>
          <table:table-cell office:value-type="string" calcext:value-type="string">
            <text:p>ARYAN BANSAL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08" calcext:value-type="float">
            <text:p>2022108</text:p>
          </table:table-cell>
          <table:table-cell office:value-type="string" calcext:value-type="string">
            <text:p>ARYAAN BAZAZ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091" calcext:value-type="float">
            <text:p>2022091</text:p>
          </table:table-cell>
          <table:table-cell office:value-type="string" calcext:value-type="string">
            <text:p>ARAV AMAWATE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12" calcext:value-type="float">
            <text:p>2022112</text:p>
          </table:table-cell>
          <table:table-cell office:value-type="string" calcext:value-type="string">
            <text:p>ARYAN SINGLA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102" calcext:value-type="float">
            <text:p>2022102</text:p>
          </table:table-cell>
          <table:table-cell office:value-type="string" calcext:value-type="string">
            <text:p>ARNAV KHANAGWAL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111" calcext:value-type="float">
            <text:p>2022111</text:p>
          </table:table-cell>
          <table:table-cell office:value-type="string" calcext:value-type="string">
            <text:p>ARYAN JAIN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15" calcext:value-type="float">
            <text:p>2022115</text:p>
          </table:table-cell>
          <table:table-cell office:value-type="string" calcext:value-type="string">
            <text:p>ASHU KUMAR JHA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113" calcext:value-type="float">
            <text:p>2022113</text:p>
          </table:table-cell>
          <table:table-cell office:value-type="string" calcext:value-type="string">
            <text:p>ASA SINGH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17" calcext:value-type="float">
            <text:p>2022117</text:p>
          </table:table-cell>
          <table:table-cell office:value-type="string" calcext:value-type="string">
            <text:p>ASHWIN VERM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19" calcext:value-type="float">
            <text:p>2022119</text:p>
          </table:table-cell>
          <table:table-cell office:value-type="string" calcext:value-type="string">
            <text:p>AVI SHARMA</text:p>
          </table:table-cell>
          <table:table-cell office:value-type="string" calcext:value-type="string">
            <text:p>CSAI</text:p>
          </table:table-cell>
        </table:table-row>
        <table:table-row table:style-name="ro4">
          <table:table-cell office:value-type="float" office:value="2022120" calcext:value-type="float">
            <text:p>2022120</text:p>
          </table:table-cell>
          <table:table-cell office:value-type="string" calcext:value-type="string">
            <text:p>AVI YASHVARDHAN MATTOO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18" calcext:value-type="float">
            <text:p>2022118</text:p>
          </table:table-cell>
          <table:table-cell office:value-type="string" calcext:value-type="string">
            <text:p>ATHIYO CHAKM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14" calcext:value-type="float">
            <text:p>2022114</text:p>
          </table:table-cell>
          <table:table-cell office:value-type="string" calcext:value-type="string">
            <text:p>ASHISH BARGOTI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122" calcext:value-type="float">
            <text:p>2022122</text:p>
          </table:table-cell>
          <table:table-cell office:value-type="string" calcext:value-type="string">
            <text:p>AYAN KUMAR SINGH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123" calcext:value-type="float">
            <text:p>2022123</text:p>
          </table:table-cell>
          <table:table-cell office:value-type="string" calcext:value-type="string">
            <text:p>AYAN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24" calcext:value-type="float">
            <text:p>2022124</text:p>
          </table:table-cell>
          <table:table-cell office:value-type="string" calcext:value-type="string">
            <text:p>AYUSH KUM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25" calcext:value-type="float">
            <text:p>2022125</text:p>
          </table:table-cell>
          <table:table-cell office:value-type="string" calcext:value-type="string">
            <text:p>AYUSH KUMAR</text:p>
          </table:table-cell>
          <table:table-cell office:value-type="string" calcext:value-type="string">
            <text:p>CSD</text:p>
          </table:table-cell>
        </table:table-row>
        <table:table-row table:style-name="ro3">
          <table:table-cell office:value-type="float" office:value="2022126" calcext:value-type="float">
            <text:p>2022126</text:p>
          </table:table-cell>
          <table:table-cell office:value-type="string" calcext:value-type="string">
            <text:p>AYUSH KUMAR MOURY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27" calcext:value-type="float">
            <text:p>2022127</text:p>
          </table:table-cell>
          <table:table-cell office:value-type="string" calcext:value-type="string">
            <text:p>AYUSH SINGHAL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128" calcext:value-type="float">
            <text:p>2022128</text:p>
          </table:table-cell>
          <table:table-cell office:value-type="string" calcext:value-type="string">
            <text:p>AYUSHMAN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129" calcext:value-type="float">
            <text:p>2022129</text:p>
          </table:table-cell>
          <table:table-cell office:value-type="string" calcext:value-type="string">
            <text:p>AYUSHMAN PANDEY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16" calcext:value-type="float">
            <text:p>2022116</text:p>
          </table:table-cell>
          <table:table-cell office:value-type="string" calcext:value-type="string">
            <text:p>ASHUTOSH DWIVED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32" calcext:value-type="float">
            <text:p>2022132</text:p>
          </table:table-cell>
          <table:table-cell office:value-type="string" calcext:value-type="string">
            <text:p>BALAIAH TARUN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130" calcext:value-type="float">
            <text:p>2022130</text:p>
          </table:table-cell>
          <table:table-cell office:value-type="string" calcext:value-type="string">
            <text:p>B LEMPUSEN JAMI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33" calcext:value-type="float">
            <text:p>2022133</text:p>
          </table:table-cell>
          <table:table-cell office:value-type="string" calcext:value-type="string">
            <text:p>BALJYOT SINGH MOD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34" calcext:value-type="float">
            <text:p>2022134</text:p>
          </table:table-cell>
          <table:table-cell office:value-type="string" calcext:value-type="string">
            <text:p>BHANU SHANDILY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36" calcext:value-type="float">
            <text:p>2022136</text:p>
          </table:table-cell>
          <table:table-cell office:value-type="string" calcext:value-type="string">
            <text:p>BHARTI BANSAL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37" calcext:value-type="float">
            <text:p>2022137</text:p>
          </table:table-cell>
          <table:table-cell office:value-type="string" calcext:value-type="string">
            <text:p>BHASKAR KASHYAP</text:p>
          </table:table-cell>
          <table:table-cell office:value-type="string" calcext:value-type="string">
            <text:p>CSB</text:p>
          </table:table-cell>
        </table:table-row>
        <table:table-row table:style-name="ro3">
          <table:table-cell office:value-type="float" office:value="2022135" calcext:value-type="float">
            <text:p>2022135</text:p>
          </table:table-cell>
          <table:table-cell office:value-type="string" calcext:value-type="string">
            <text:p>BHARGAV RAMAN RAJAN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38" calcext:value-type="float">
            <text:p>2022138</text:p>
          </table:table-cell>
          <table:table-cell office:value-type="string" calcext:value-type="string">
            <text:p>CHAHAT AHUJA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139" calcext:value-type="float">
            <text:p>2022139</text:p>
          </table:table-cell>
          <table:table-cell office:value-type="string" calcext:value-type="string">
            <text:p>CHAITANYA DHRUV SAHU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142" calcext:value-type="float">
            <text:p>2022142</text:p>
          </table:table-cell>
          <table:table-cell office:value-type="string" calcext:value-type="string">
            <text:p>DAKS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43" calcext:value-type="float">
            <text:p>2022143</text:p>
          </table:table-cell>
          <table:table-cell office:value-type="string" calcext:value-type="string">
            <text:p>DAKSH YAD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40" calcext:value-type="float">
            <text:p>2022140</text:p>
          </table:table-cell>
          <table:table-cell office:value-type="string" calcext:value-type="string">
            <text:p>CHANDAN SAH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41" calcext:value-type="float">
            <text:p>2022141</text:p>
          </table:table-cell>
          <table:table-cell office:value-type="string" calcext:value-type="string">
            <text:p>CHAWAN SRUJEETH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44" calcext:value-type="float">
            <text:p>2022144</text:p>
          </table:table-cell>
          <table:table-cell office:value-type="string" calcext:value-type="string">
            <text:p>DASARI SAI HARSH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21" calcext:value-type="float">
            <text:p>2022121</text:p>
          </table:table-cell>
          <table:table-cell office:value-type="string" calcext:value-type="string">
            <text:p>AYAAN HASAN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31" calcext:value-type="float">
            <text:p>2022131</text:p>
          </table:table-cell>
          <table:table-cell office:value-type="string" calcext:value-type="string">
            <text:p>BAGADI ABHINAV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47" calcext:value-type="float">
            <text:p>2022147</text:p>
          </table:table-cell>
          <table:table-cell office:value-type="string" calcext:value-type="string">
            <text:p>DEEPANSHU VAISHNAV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48" calcext:value-type="float">
            <text:p>2022148</text:p>
          </table:table-cell>
          <table:table-cell office:value-type="string" calcext:value-type="string">
            <text:p>DEEPESH SAHU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49" calcext:value-type="float">
            <text:p>2022149</text:p>
          </table:table-cell>
          <table:table-cell office:value-type="string" calcext:value-type="string">
            <text:p>DEV PANCHAL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150" calcext:value-type="float">
            <text:p>2022150</text:p>
          </table:table-cell>
          <table:table-cell office:value-type="string" calcext:value-type="string">
            <text:p>DEV UTKARSH PAL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51" calcext:value-type="float">
            <text:p>2022151</text:p>
          </table:table-cell>
          <table:table-cell office:value-type="string" calcext:value-type="string">
            <text:p>DEVANSH GROVER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52" calcext:value-type="float">
            <text:p>2022152</text:p>
          </table:table-cell>
          <table:table-cell office:value-type="string" calcext:value-type="string">
            <text:p>DEVANSH KUM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53" calcext:value-type="float">
            <text:p>2022153</text:p>
          </table:table-cell>
          <table:table-cell office:value-type="string" calcext:value-type="string">
            <text:p>DEVANSHU CHANDEL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54" calcext:value-type="float">
            <text:p>2022154</text:p>
          </table:table-cell>
          <table:table-cell office:value-type="string" calcext:value-type="string">
            <text:p>DEVESH HOOD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55" calcext:value-type="float">
            <text:p>2022155</text:p>
          </table:table-cell>
          <table:table-cell office:value-type="string" calcext:value-type="string">
            <text:p>DEVESH KUMAR</text:p>
          </table:table-cell>
          <table:table-cell office:value-type="string" calcext:value-type="string">
            <text:p>CSB</text:p>
          </table:table-cell>
        </table:table-row>
        <table:table-row table:style-name="ro3">
          <table:table-cell office:value-type="float" office:value="2022156" calcext:value-type="float">
            <text:p>2022156</text:p>
          </table:table-cell>
          <table:table-cell office:value-type="string" calcext:value-type="string">
            <text:p>DEVYANSH CHAUDHARY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145" calcext:value-type="float">
            <text:p>2022145</text:p>
          </table:table-cell>
          <table:table-cell office:value-type="string" calcext:value-type="string">
            <text:p>DAYANAND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58" calcext:value-type="float">
            <text:p>2022158</text:p>
          </table:table-cell>
          <table:table-cell office:value-type="string" calcext:value-type="string">
            <text:p>DHARMENDE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59" calcext:value-type="float">
            <text:p>2022159</text:p>
          </table:table-cell>
          <table:table-cell office:value-type="string" calcext:value-type="string">
            <text:p>DHAWAL BANSA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60" calcext:value-type="float">
            <text:p>2022160</text:p>
          </table:table-cell>
          <table:table-cell office:value-type="string" calcext:value-type="string">
            <text:p>DHAWAL GARG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161" calcext:value-type="float">
            <text:p>2022161</text:p>
          </table:table-cell>
          <table:table-cell office:value-type="string" calcext:value-type="string">
            <text:p>DHEERAJ KANT SING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46" calcext:value-type="float">
            <text:p>2022146</text:p>
          </table:table-cell>
          <table:table-cell office:value-type="string" calcext:value-type="string">
            <text:p>DEBJIT BANERJ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63" calcext:value-type="float">
            <text:p>2022163</text:p>
          </table:table-cell>
          <table:table-cell office:value-type="string" calcext:value-type="string">
            <text:p>DHRUV BARGOTI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164" calcext:value-type="float">
            <text:p>2022164</text:p>
          </table:table-cell>
          <table:table-cell office:value-type="string" calcext:value-type="string">
            <text:p>DHRUV CHHABR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65" calcext:value-type="float">
            <text:p>2022165</text:p>
          </table:table-cell>
          <table:table-cell office:value-type="string" calcext:value-type="string">
            <text:p>DHRUV DEWAN</text:p>
          </table:table-cell>
          <table:table-cell office:value-type="string" calcext:value-type="string">
            <text:p>ECE</text:p>
          </table:table-cell>
        </table:table-row>
        <table:table-row table:style-name="ro2">
          <table:table-cell office:value-type="float" office:value="2022166" calcext:value-type="float">
            <text:p>2022166</text:p>
          </table:table-cell>
          <table:table-cell office:value-type="string" calcext:value-type="string">
            <text:p>DHRUV JAI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68" calcext:value-type="float">
            <text:p>2022168</text:p>
          </table:table-cell>
          <table:table-cell office:value-type="string" calcext:value-type="string">
            <text:p>DHRUV PRAKASH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69" calcext:value-type="float">
            <text:p>2022169</text:p>
          </table:table-cell>
          <table:table-cell office:value-type="string" calcext:value-type="string">
            <text:p>DHRUV RAJPUT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67" calcext:value-type="float">
            <text:p>2022167</text:p>
          </table:table-cell>
          <table:table-cell office:value-type="string" calcext:value-type="string">
            <text:p>DHRUV KANTROO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71" calcext:value-type="float">
            <text:p>2022171</text:p>
          </table:table-cell>
          <table:table-cell office:value-type="string" calcext:value-type="string">
            <text:p>DHRUV SHARM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172" calcext:value-type="float">
            <text:p>2022172</text:p>
          </table:table-cell>
          <table:table-cell office:value-type="string" calcext:value-type="string">
            <text:p>DHRUV VERM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70" calcext:value-type="float">
            <text:p>2022170</text:p>
          </table:table-cell>
          <table:table-cell office:value-type="string" calcext:value-type="string">
            <text:p>DHRUV SHARM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73" calcext:value-type="float">
            <text:p>2022173</text:p>
          </table:table-cell>
          <table:table-cell office:value-type="string" calcext:value-type="string">
            <text:p>DHRUV YADAV</text:p>
          </table:table-cell>
          <table:table-cell office:value-type="string" calcext:value-type="string">
            <text:p>CSSS</text:p>
          </table:table-cell>
        </table:table-row>
        <table:table-row table:style-name="ro2">
          <table:table-cell office:value-type="float" office:value="2022157" calcext:value-type="float">
            <text:p>2022157</text:p>
          </table:table-cell>
          <table:table-cell office:value-type="string" calcext:value-type="string">
            <text:p>DHAIRY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76" calcext:value-type="float">
            <text:p>2022176</text:p>
          </table:table-cell>
          <table:table-cell office:value-type="string" calcext:value-type="string">
            <text:p>DIKSHANT KUKREJ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74" calcext:value-type="float">
            <text:p>2022174</text:p>
          </table:table-cell>
          <table:table-cell office:value-type="string" calcext:value-type="string">
            <text:p>DHYAN KAVAR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162" calcext:value-type="float">
            <text:p>2022162</text:p>
          </table:table-cell>
          <table:table-cell office:value-type="string" calcext:value-type="string">
            <text:p>DHRUV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79" calcext:value-type="float">
            <text:p>2022179</text:p>
          </table:table-cell>
          <table:table-cell office:value-type="string" calcext:value-type="string">
            <text:p>DIVYANSH MOGRA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180" calcext:value-type="float">
            <text:p>2022180</text:p>
          </table:table-cell>
          <table:table-cell office:value-type="string" calcext:value-type="string">
            <text:p>DIVYASHA PRIYADARSHINI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181" calcext:value-type="float">
            <text:p>2022181</text:p>
          </table:table-cell>
          <table:table-cell office:value-type="string" calcext:value-type="string">
            <text:p>DUSHYANT SING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83" calcext:value-type="float">
            <text:p>2022183</text:p>
          </table:table-cell>
          <table:table-cell office:value-type="string" calcext:value-type="string">
            <text:p>GAGAN RAJ SINGH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84" calcext:value-type="float">
            <text:p>2022184</text:p>
          </table:table-cell>
          <table:table-cell office:value-type="string" calcext:value-type="string">
            <text:p>GARV SACHDEV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82" calcext:value-type="float">
            <text:p>2022182</text:p>
          </table:table-cell>
          <table:table-cell office:value-type="string" calcext:value-type="string">
            <text:p>ELWIN BABU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185" calcext:value-type="float">
            <text:p>2022185</text:p>
          </table:table-cell>
          <table:table-cell office:value-type="string" calcext:value-type="string">
            <text:p>GARVIT KOCH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87" calcext:value-type="float">
            <text:p>2022187</text:p>
          </table:table-cell>
          <table:table-cell office:value-type="string" calcext:value-type="string">
            <text:p>GAUTAM KUMAR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88" calcext:value-type="float">
            <text:p>2022188</text:p>
          </table:table-cell>
          <table:table-cell office:value-type="string" calcext:value-type="string">
            <text:p>GAUTAM SINGH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189" calcext:value-type="float">
            <text:p>2022189</text:p>
          </table:table-cell>
          <table:table-cell office:value-type="string" calcext:value-type="string">
            <text:p>GRISHMA BELLANI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90" calcext:value-type="float">
            <text:p>2022190</text:p>
          </table:table-cell>
          <table:table-cell office:value-type="string" calcext:value-type="string">
            <text:p>GUNEET PAL SING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92" calcext:value-type="float">
            <text:p>2022192</text:p>
          </table:table-cell>
          <table:table-cell office:value-type="string" calcext:value-type="string">
            <text:p>GURVENDER SING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193" calcext:value-type="float">
            <text:p>2022193</text:p>
          </table:table-cell>
          <table:table-cell office:value-type="string" calcext:value-type="string">
            <text:p>HARDIK SACHDEVA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191" calcext:value-type="float">
            <text:p>2022191</text:p>
          </table:table-cell>
          <table:table-cell office:value-type="string" calcext:value-type="string">
            <text:p>GURUPRIYA VAIKUNDAM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194" calcext:value-type="float">
            <text:p>2022194</text:p>
          </table:table-cell>
          <table:table-cell office:value-type="string" calcext:value-type="string">
            <text:p>HARIOM TIWARI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195" calcext:value-type="float">
            <text:p>2022195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197" calcext:value-type="float">
            <text:p>2022197</text:p>
          </table:table-cell>
          <table:table-cell office:value-type="string" calcext:value-type="string">
            <text:p>HARSH HINGORANI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175" calcext:value-type="float">
            <text:p>2022175</text:p>
          </table:table-cell>
          <table:table-cell office:value-type="string" calcext:value-type="string">
            <text:p>DIKSHANT AGAR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199" calcext:value-type="float">
            <text:p>2022199</text:p>
          </table:table-cell>
          <table:table-cell office:value-type="string" calcext:value-type="string">
            <text:p>HARSH NANGI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01" calcext:value-type="float">
            <text:p>2022201</text:p>
          </table:table-cell>
          <table:table-cell office:value-type="string" calcext:value-type="string">
            <text:p>HARSH RAJPUT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02" calcext:value-type="float">
            <text:p>2022202</text:p>
          </table:table-cell>
          <table:table-cell office:value-type="string" calcext:value-type="string">
            <text:p>HARSH RAWAT</text:p>
          </table:table-cell>
          <table:table-cell office:value-type="string" calcext:value-type="string">
            <text:p>CSAM</text:p>
          </table:table-cell>
        </table:table-row>
        <table:table-row table:style-name="ro4">
          <table:table-cell office:value-type="float" office:value="2022200" calcext:value-type="float">
            <text:p>2022200</text:p>
          </table:table-cell>
          <table:table-cell office:value-type="string" calcext:value-type="string">
            <text:p>HARSH PRITESHKUMAR MISTRY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03" calcext:value-type="float">
            <text:p>2022203</text:p>
          </table:table-cell>
          <table:table-cell office:value-type="string" calcext:value-type="string">
            <text:p>HARSH UPADHYAY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178" calcext:value-type="float">
            <text:p>2022178</text:p>
          </table:table-cell>
          <table:table-cell office:value-type="string" calcext:value-type="string">
            <text:p>DIVYANSH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07" calcext:value-type="float">
            <text:p>2022207</text:p>
          </table:table-cell>
          <table:table-cell office:value-type="string" calcext:value-type="string">
            <text:p>HARSHIT ARY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08" calcext:value-type="float">
            <text:p>2022208</text:p>
          </table:table-cell>
          <table:table-cell office:value-type="string" calcext:value-type="string">
            <text:p>HARSHIT GAUTAM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06" calcext:value-type="float">
            <text:p>2022206</text:p>
          </table:table-cell>
          <table:table-cell office:value-type="string" calcext:value-type="string">
            <text:p>HARSHIL HANDOO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198" calcext:value-type="float">
            <text:p>2022198</text:p>
          </table:table-cell>
          <table:table-cell office:value-type="string" calcext:value-type="string">
            <text:p>HARSH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10" calcext:value-type="float">
            <text:p>2022210</text:p>
          </table:table-cell>
          <table:table-cell office:value-type="string" calcext:value-type="string">
            <text:p>HARSHIT SAGAR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205" calcext:value-type="float">
            <text:p>2022205</text:p>
          </table:table-cell>
          <table:table-cell office:value-type="string" calcext:value-type="string">
            <text:p>HARSH VISHWAKARM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09" calcext:value-type="float">
            <text:p>2022209</text:p>
          </table:table-cell>
          <table:table-cell office:value-type="string" calcext:value-type="string">
            <text:p>HARSHIT GUPTA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212" calcext:value-type="float">
            <text:p>2022212</text:p>
          </table:table-cell>
          <table:table-cell office:value-type="string" calcext:value-type="string">
            <text:p>HEMANTH DINDIGALLU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213" calcext:value-type="float">
            <text:p>2022213</text:p>
          </table:table-cell>
          <table:table-cell office:value-type="string" calcext:value-type="string">
            <text:p>HET RITESHKUMAR SHAH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214" calcext:value-type="float">
            <text:p>2022214</text:p>
          </table:table-cell>
          <table:table-cell office:value-type="string" calcext:value-type="string">
            <text:p>HIMANG CHANDRA GARG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15" calcext:value-type="float">
            <text:p>2022215</text:p>
          </table:table-cell>
          <table:table-cell office:value-type="string" calcext:value-type="string">
            <text:p>HIMANSHU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18" calcext:value-type="float">
            <text:p>2022218</text:p>
          </table:table-cell>
          <table:table-cell office:value-type="string" calcext:value-type="string">
            <text:p>HIMEKSH MALHOTR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19" calcext:value-type="float">
            <text:p>2022219</text:p>
          </table:table-cell>
          <table:table-cell office:value-type="string" calcext:value-type="string">
            <text:p>HRITICK KUSHWAH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20" calcext:value-type="float">
            <text:p>2022220</text:p>
          </table:table-cell>
          <table:table-cell office:value-type="string" calcext:value-type="string">
            <text:p>IDHANT AROR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221" calcext:value-type="float">
            <text:p>2022221</text:p>
          </table:table-cell>
          <table:table-cell office:value-type="string" calcext:value-type="string">
            <text:p>ISHAAN AGRAWAL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22" calcext:value-type="float">
            <text:p>2022222</text:p>
          </table:table-cell>
          <table:table-cell office:value-type="string" calcext:value-type="string">
            <text:p>ISHIKA GUPT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23" calcext:value-type="float">
            <text:p>2022223</text:p>
          </table:table-cell>
          <table:table-cell office:value-type="string" calcext:value-type="string">
            <text:p>ISHIR BHARDWAJ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224" calcext:value-type="float">
            <text:p>2022224</text:p>
          </table:table-cell>
          <table:table-cell office:value-type="string" calcext:value-type="string">
            <text:p>ISHIT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26" calcext:value-type="float">
            <text:p>2022226</text:p>
          </table:table-cell>
          <table:table-cell office:value-type="string" calcext:value-type="string">
            <text:p>JAS KEERAT SINGH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227" calcext:value-type="float">
            <text:p>2022227</text:p>
          </table:table-cell>
          <table:table-cell office:value-type="string" calcext:value-type="string">
            <text:p>JASKARAN SINGH</text:p>
          </table:table-cell>
          <table:table-cell office:value-type="string" calcext:value-type="string">
            <text:p>CSSS</text:p>
          </table:table-cell>
        </table:table-row>
        <table:table-row table:style-name="ro4">
          <table:table-cell office:value-type="float" office:value="2022225" calcext:value-type="float">
            <text:p>2022225</text:p>
          </table:table-cell>
          <table:table-cell office:value-type="string" calcext:value-type="string">
            <text:p>JALEEL AHMED RADHU KHWAJ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28" calcext:value-type="float">
            <text:p>2022228</text:p>
          </table:table-cell>
          <table:table-cell office:value-type="string" calcext:value-type="string">
            <text:p>JATIN AGGARWA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29" calcext:value-type="float">
            <text:p>2022229</text:p>
          </table:table-cell>
          <table:table-cell office:value-type="string" calcext:value-type="string">
            <text:p>JATIN SHARMA</text:p>
          </table:table-cell>
          <table:table-cell office:value-type="string" calcext:value-type="string">
            <text:p>CSD</text:p>
          </table:table-cell>
        </table:table-row>
        <table:table-row table:style-name="ro3">
          <table:table-cell office:value-type="float" office:value="2022230" calcext:value-type="float">
            <text:p>2022230</text:p>
          </table:table-cell>
          <table:table-cell office:value-type="string" calcext:value-type="string">
            <text:p>JESSICA KAUR CHAWL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31" calcext:value-type="float">
            <text:p>2022231</text:p>
          </table:table-cell>
          <table:table-cell office:value-type="string" calcext:value-type="string">
            <text:p>KABIR KAUSHAL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232" calcext:value-type="float">
            <text:p>2022232</text:p>
          </table:table-cell>
          <table:table-cell office:value-type="string" calcext:value-type="string">
            <text:p>KANAK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34" calcext:value-type="float">
            <text:p>2022234</text:p>
          </table:table-cell>
          <table:table-cell office:value-type="string" calcext:value-type="string">
            <text:p>KARAN YAD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235" calcext:value-type="float">
            <text:p>2022235</text:p>
          </table:table-cell>
          <table:table-cell office:value-type="string" calcext:value-type="string">
            <text:p>KARANJEET SINGH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233" calcext:value-type="float">
            <text:p>2022233</text:p>
          </table:table-cell>
          <table:table-cell office:value-type="string" calcext:value-type="string">
            <text:p>KANISHK KUMAR MEEN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36" calcext:value-type="float">
            <text:p>2022236</text:p>
          </table:table-cell>
          <table:table-cell office:value-type="string" calcext:value-type="string">
            <text:p>KARTAVYA CHAUHAN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16" calcext:value-type="float">
            <text:p>2022216</text:p>
          </table:table-cell>
          <table:table-cell office:value-type="string" calcext:value-type="string">
            <text:p>HIMANSHU RAJ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39" calcext:value-type="float">
            <text:p>2022239</text:p>
          </table:table-cell>
          <table:table-cell office:value-type="string" calcext:value-type="string">
            <text:p>KARTIK KUMAR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240" calcext:value-type="float">
            <text:p>2022240</text:p>
          </table:table-cell>
          <table:table-cell office:value-type="string" calcext:value-type="string">
            <text:p>KARTIK PRASAD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17" calcext:value-type="float">
            <text:p>2022217</text:p>
          </table:table-cell>
          <table:table-cell office:value-type="string" calcext:value-type="string">
            <text:p>HIMANSHU SINGH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42" calcext:value-type="float">
            <text:p>2022242</text:p>
          </table:table-cell>
          <table:table-cell office:value-type="string" calcext:value-type="string">
            <text:p>KARTIKEYA CHHIKAR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43" calcext:value-type="float">
            <text:p>2022243</text:p>
          </table:table-cell>
          <table:table-cell office:value-type="string" calcext:value-type="string">
            <text:p>KARTIKEYA MALIK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238" calcext:value-type="float">
            <text:p>2022238</text:p>
          </table:table-cell>
          <table:table-cell office:value-type="string" calcext:value-type="string">
            <text:p>KARTIK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45" calcext:value-type="float">
            <text:p>2022245</text:p>
          </table:table-cell>
          <table:table-cell office:value-type="string" calcext:value-type="string">
            <text:p>KASHVI PANVAND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46" calcext:value-type="float">
            <text:p>2022246</text:p>
          </table:table-cell>
          <table:table-cell office:value-type="string" calcext:value-type="string">
            <text:p>KESHAV BINDLISH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241" calcext:value-type="float">
            <text:p>2022241</text:p>
          </table:table-cell>
          <table:table-cell office:value-type="string" calcext:value-type="string">
            <text:p>KARTIKEYA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248" calcext:value-type="float">
            <text:p>2022248</text:p>
          </table:table-cell>
          <table:table-cell office:value-type="string" calcext:value-type="string">
            <text:p>KETAN MOHAN GARG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249" calcext:value-type="float">
            <text:p>2022249</text:p>
          </table:table-cell>
          <table:table-cell office:value-type="string" calcext:value-type="string">
            <text:p>KHUSHAL YADAV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250" calcext:value-type="float">
            <text:p>2022250</text:p>
          </table:table-cell>
          <table:table-cell office:value-type="string" calcext:value-type="string">
            <text:p>KIRTI JAIN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251" calcext:value-type="float">
            <text:p>2022251</text:p>
          </table:table-cell>
          <table:table-cell office:value-type="string" calcext:value-type="string">
            <text:p>KOMA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52" calcext:value-type="float">
            <text:p>2022252</text:p>
          </table:table-cell>
          <table:table-cell office:value-type="string" calcext:value-type="string">
            <text:p>KRATIK GUPTA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253" calcext:value-type="float">
            <text:p>2022253</text:p>
          </table:table-cell>
          <table:table-cell office:value-type="string" calcext:value-type="string">
            <text:p>KRISH KUMAR BHORUK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54" calcext:value-type="float">
            <text:p>2022254</text:p>
          </table:table-cell>
          <table:table-cell office:value-type="string" calcext:value-type="string">
            <text:p>KRISHNA SHUKL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55" calcext:value-type="float">
            <text:p>2022255</text:p>
          </table:table-cell>
          <table:table-cell office:value-type="string" calcext:value-type="string">
            <text:p>KRISHNENDU JAN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257" calcext:value-type="float">
            <text:p>2022257</text:p>
          </table:table-cell>
          <table:table-cell office:value-type="string" calcext:value-type="string">
            <text:p>KSHITIJ GUPT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58" calcext:value-type="float">
            <text:p>2022258</text:p>
          </table:table-cell>
          <table:table-cell office:value-type="string" calcext:value-type="string">
            <text:p>KUMAR MRINAL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256" calcext:value-type="float">
            <text:p>2022256</text:p>
          </table:table-cell>
          <table:table-cell office:value-type="string" calcext:value-type="string">
            <text:p>KSHITIJ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259" calcext:value-type="float">
            <text:p>2022259</text:p>
          </table:table-cell>
          <table:table-cell office:value-type="string" calcext:value-type="string">
            <text:p>KUNAL</text:p>
          </table:table-cell>
          <table:table-cell office:value-type="string" calcext:value-type="string">
            <text:p>CSSS</text:p>
          </table:table-cell>
        </table:table-row>
        <table:table-row table:style-name="ro2">
          <table:table-cell office:value-type="float" office:value="2022260" calcext:value-type="float">
            <text:p>2022260</text:p>
          </table:table-cell>
          <table:table-cell office:value-type="string" calcext:value-type="string">
            <text:p>KUNAL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61" calcext:value-type="float">
            <text:p>2022261</text:p>
          </table:table-cell>
          <table:table-cell office:value-type="string" calcext:value-type="string">
            <text:p>KUNAL DANGI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62" calcext:value-type="float">
            <text:p>2022262</text:p>
          </table:table-cell>
          <table:table-cell office:value-type="string" calcext:value-type="string">
            <text:p>KUNAL SHARM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44" calcext:value-type="float">
            <text:p>2022244</text:p>
          </table:table-cell>
          <table:table-cell office:value-type="string" calcext:value-type="string">
            <text:p>KARTIKEYA SEHGAL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264" calcext:value-type="float">
            <text:p>2022264</text:p>
          </table:table-cell>
          <table:table-cell office:value-type="string" calcext:value-type="string">
            <text:p>KUVAM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265" calcext:value-type="float">
            <text:p>2022265</text:p>
          </table:table-cell>
          <table:table-cell office:value-type="string" calcext:value-type="string">
            <text:p>LAKSHAY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66" calcext:value-type="float">
            <text:p>2022266</text:p>
          </table:table-cell>
          <table:table-cell office:value-type="string" calcext:value-type="string">
            <text:p>LAKSHAY KUMAR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67" calcext:value-type="float">
            <text:p>2022267</text:p>
          </table:table-cell>
          <table:table-cell office:value-type="string" calcext:value-type="string">
            <text:p>LAKSHAY TREHA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47" calcext:value-type="float">
            <text:p>2022247</text:p>
          </table:table-cell>
          <table:table-cell office:value-type="string" calcext:value-type="string">
            <text:p>KESHAV CHHABR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63" calcext:value-type="float">
            <text:p>2022263</text:p>
          </table:table-cell>
          <table:table-cell office:value-type="string" calcext:value-type="string">
            <text:p>KUSHAGRA GUPT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70" calcext:value-type="float">
            <text:p>2022270</text:p>
          </table:table-cell>
          <table:table-cell office:value-type="string" calcext:value-type="string">
            <text:p>MADHAV KANSIL</text:p>
          </table:table-cell>
          <table:table-cell office:value-type="string" calcext:value-type="string">
            <text:p>CSSS</text:p>
          </table:table-cell>
        </table:table-row>
        <table:table-row table:style-name="ro4">
          <table:table-cell office:value-type="float" office:value="2022271" calcext:value-type="float">
            <text:p>2022271</text:p>
          </table:table-cell>
          <table:table-cell office:value-type="string" calcext:value-type="string">
            <text:p>MAHANAMA SIRIWARDHANA</text:p>
          </table:table-cell>
          <table:table-cell office:value-type="string" calcext:value-type="string">
            <text:p>CSB</text:p>
          </table:table-cell>
        </table:table-row>
        <table:table-row table:style-name="ro2">
          <table:table-cell office:value-type="float" office:value="2022272" calcext:value-type="float">
            <text:p>2022272</text:p>
          </table:table-cell>
          <table:table-cell office:value-type="string" calcext:value-type="string">
            <text:p>MAHI MANN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73" calcext:value-type="float">
            <text:p>2022273</text:p>
          </table:table-cell>
          <table:table-cell office:value-type="string" calcext:value-type="string">
            <text:p>MANAN AGGAR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74" calcext:value-type="float">
            <text:p>2022274</text:p>
          </table:table-cell>
          <table:table-cell office:value-type="string" calcext:value-type="string">
            <text:p>MANAN KADECH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75" calcext:value-type="float">
            <text:p>2022275</text:p>
          </table:table-cell>
          <table:table-cell office:value-type="string" calcext:value-type="string">
            <text:p>MANANYA KOHLI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276" calcext:value-type="float">
            <text:p>2022276</text:p>
          </table:table-cell>
          <table:table-cell office:value-type="string" calcext:value-type="string">
            <text:p>MANAS CHHABR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77" calcext:value-type="float">
            <text:p>2022277</text:p>
          </table:table-cell>
          <table:table-cell office:value-type="string" calcext:value-type="string">
            <text:p>MANIT KAUSHIK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68" calcext:value-type="float">
            <text:p>2022268</text:p>
          </table:table-cell>
          <table:table-cell office:value-type="string" calcext:value-type="string">
            <text:p>LAKSHYA DAYM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79" calcext:value-type="float">
            <text:p>2022279</text:p>
          </table:table-cell>
          <table:table-cell office:value-type="string" calcext:value-type="string">
            <text:p>MANN SHARM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80" calcext:value-type="float">
            <text:p>2022280</text:p>
          </table:table-cell>
          <table:table-cell office:value-type="string" calcext:value-type="string">
            <text:p>MANVEET SINGH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281" calcext:value-type="float">
            <text:p>2022281</text:p>
          </table:table-cell>
          <table:table-cell office:value-type="string" calcext:value-type="string">
            <text:p>MANYA AGRAWAL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283" calcext:value-type="float">
            <text:p>2022283</text:p>
          </table:table-cell>
          <table:table-cell office:value-type="string" calcext:value-type="string">
            <text:p>MAYANK GAUTAM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278" calcext:value-type="float">
            <text:p>2022278</text:p>
          </table:table-cell>
          <table:table-cell office:value-type="string" calcext:value-type="string">
            <text:p>MANN NARIY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85" calcext:value-type="float">
            <text:p>2022285</text:p>
          </table:table-cell>
          <table:table-cell office:value-type="string" calcext:value-type="string">
            <text:p>MAYANK KUMAR</text:p>
          </table:table-cell>
          <table:table-cell office:value-type="string" calcext:value-type="string">
            <text:p>CSSS</text:p>
          </table:table-cell>
        </table:table-row>
        <table:table-row table:style-name="ro3">
          <table:table-cell office:value-type="float" office:value="2022286" calcext:value-type="float">
            <text:p>2022286</text:p>
          </table:table-cell>
          <table:table-cell office:value-type="string" calcext:value-type="string">
            <text:p>MAYANK KUMAR KANKHERI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87" calcext:value-type="float">
            <text:p>2022287</text:p>
          </table:table-cell>
          <table:table-cell office:value-type="string" calcext:value-type="string">
            <text:p>MAYANK SINGH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288" calcext:value-type="float">
            <text:p>2022288</text:p>
          </table:table-cell>
          <table:table-cell office:value-type="string" calcext:value-type="string">
            <text:p>MD ASHIF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282" calcext:value-type="float">
            <text:p>2022282</text:p>
          </table:table-cell>
          <table:table-cell office:value-type="string" calcext:value-type="string">
            <text:p>MAULIK MAHEY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290" calcext:value-type="float">
            <text:p>2022290</text:p>
          </table:table-cell>
          <table:table-cell office:value-type="string" calcext:value-type="string">
            <text:p>MD RAIYAAN TARIQUE</text:p>
          </table:table-cell>
          <table:table-cell office:value-type="string" calcext:value-type="string">
            <text:p>CSB</text:p>
          </table:table-cell>
        </table:table-row>
        <table:table-row table:style-name="ro3">
          <table:table-cell office:value-type="float" office:value="2022291" calcext:value-type="float">
            <text:p>2022291</text:p>
          </table:table-cell>
          <table:table-cell office:value-type="string" calcext:value-type="string">
            <text:p>MD SARFARAZ ANWAR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84" calcext:value-type="float">
            <text:p>2022284</text:p>
          </table:table-cell>
          <table:table-cell office:value-type="string" calcext:value-type="string">
            <text:p>MAYANK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93" calcext:value-type="float">
            <text:p>2022293</text:p>
          </table:table-cell>
          <table:table-cell office:value-type="string" calcext:value-type="string">
            <text:p>MEHRAZ ABEDIN RAZ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295" calcext:value-type="float">
            <text:p>2022295</text:p>
          </table:table-cell>
          <table:table-cell office:value-type="string" calcext:value-type="string">
            <text:p>MEHUL PAHUJ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296" calcext:value-type="float">
            <text:p>2022296</text:p>
          </table:table-cell>
          <table:table-cell office:value-type="string" calcext:value-type="string">
            <text:p>MINTU KUMAR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294" calcext:value-type="float">
            <text:p>2022294</text:p>
          </table:table-cell>
          <table:table-cell office:value-type="string" calcext:value-type="string">
            <text:p>MEHUL AGARWAL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297" calcext:value-type="float">
            <text:p>2022297</text:p>
          </table:table-cell>
          <table:table-cell office:value-type="string" calcext:value-type="string">
            <text:p>MOHAMMAD AREEB ANSARI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289" calcext:value-type="float">
            <text:p>2022289</text:p>
          </table:table-cell>
          <table:table-cell office:value-type="string" calcext:value-type="string">
            <text:p>MD KAIF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292" calcext:value-type="float">
            <text:p>2022292</text:p>
          </table:table-cell>
          <table:table-cell office:value-type="string" calcext:value-type="string">
            <text:p>MEDHA KASHYAP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00" calcext:value-type="float">
            <text:p>2022300</text:p>
          </table:table-cell>
          <table:table-cell office:value-type="string" calcext:value-type="string">
            <text:p>MOHD SHADAB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01" calcext:value-type="float">
            <text:p>2022301</text:p>
          </table:table-cell>
          <table:table-cell office:value-type="string" calcext:value-type="string">
            <text:p>MOHIT MEHR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02" calcext:value-type="float">
            <text:p>2022302</text:p>
          </table:table-cell>
          <table:table-cell office:value-type="string" calcext:value-type="string">
            <text:p>MOHMMAD AYAAN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03" calcext:value-type="float">
            <text:p>2022303</text:p>
          </table:table-cell>
          <table:table-cell office:value-type="string" calcext:value-type="string">
            <text:p>MRIDUL GOE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04" calcext:value-type="float">
            <text:p>2022304</text:p>
          </table:table-cell>
          <table:table-cell office:value-type="string" calcext:value-type="string">
            <text:p>MRINALIKA SINGH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305" calcext:value-type="float">
            <text:p>2022305</text:p>
          </table:table-cell>
          <table:table-cell office:value-type="string" calcext:value-type="string">
            <text:p>MRINANK KATYAYAN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298" calcext:value-type="float">
            <text:p>2022298</text:p>
          </table:table-cell>
          <table:table-cell office:value-type="string" calcext:value-type="string">
            <text:p>MOHD IRFAN RAZA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308" calcext:value-type="float">
            <text:p>2022308</text:p>
          </table:table-cell>
          <table:table-cell office:value-type="string" calcext:value-type="string">
            <text:p>NAITIK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09" calcext:value-type="float">
            <text:p>2022309</text:p>
          </table:table-cell>
          <table:table-cell office:value-type="string" calcext:value-type="string">
            <text:p>NAKUL GARG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307" calcext:value-type="float">
            <text:p>2022307</text:p>
          </table:table-cell>
          <table:table-cell office:value-type="string" calcext:value-type="string">
            <text:p>MUTHURAJ VAIRAMUTHU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10" calcext:value-type="float">
            <text:p>2022310</text:p>
          </table:table-cell>
          <table:table-cell office:value-type="string" calcext:value-type="string">
            <text:p>NAMAN BIRL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11" calcext:value-type="float">
            <text:p>2022311</text:p>
          </table:table-cell>
          <table:table-cell office:value-type="string" calcext:value-type="string">
            <text:p>NAMAN JINDAL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12" calcext:value-type="float">
            <text:p>2022312</text:p>
          </table:table-cell>
          <table:table-cell office:value-type="string" calcext:value-type="string">
            <text:p>NAMAN SINGH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299" calcext:value-type="float">
            <text:p>2022299</text:p>
          </table:table-cell>
          <table:table-cell office:value-type="string" calcext:value-type="string">
            <text:p>MOHD MASOOD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14" calcext:value-type="float">
            <text:p>2022314</text:p>
          </table:table-cell>
          <table:table-cell office:value-type="string" calcext:value-type="string">
            <text:p>NAMIT GUPT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06" calcext:value-type="float">
            <text:p>2022306</text:p>
          </table:table-cell>
          <table:table-cell office:value-type="string" calcext:value-type="string">
            <text:p>MUDIT BANS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16" calcext:value-type="float">
            <text:p>2022316</text:p>
          </table:table-cell>
          <table:table-cell office:value-type="string" calcext:value-type="string">
            <text:p>NANDINI JAI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13" calcext:value-type="float">
            <text:p>2022313</text:p>
          </table:table-cell>
          <table:table-cell office:value-type="string" calcext:value-type="string">
            <text:p>NAMIT BHADANA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318" calcext:value-type="float">
            <text:p>2022318</text:p>
          </table:table-cell>
          <table:table-cell office:value-type="string" calcext:value-type="string">
            <text:p>NEELU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19" calcext:value-type="float">
            <text:p>2022319</text:p>
          </table:table-cell>
          <table:table-cell office:value-type="string" calcext:value-type="string">
            <text:p>NEIL MEHT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20" calcext:value-type="float">
            <text:p>2022320</text:p>
          </table:table-cell>
          <table:table-cell office:value-type="string" calcext:value-type="string">
            <text:p>NIKET AGARWAL</text:p>
          </table:table-cell>
          <table:table-cell office:value-type="string" calcext:value-type="string">
            <text:p>CSB</text:p>
          </table:table-cell>
        </table:table-row>
        <table:table-row table:style-name="ro2">
          <table:table-cell office:value-type="float" office:value="2022315" calcext:value-type="float">
            <text:p>2022315</text:p>
          </table:table-cell>
          <table:table-cell office:value-type="string" calcext:value-type="string">
            <text:p>NAMIT JAIN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17" calcext:value-type="float">
            <text:p>2022317</text:p>
          </table:table-cell>
          <table:table-cell office:value-type="string" calcext:value-type="string">
            <text:p>NAVYAM GARG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24" calcext:value-type="float">
            <text:p>2022324</text:p>
          </table:table-cell>
          <table:table-cell office:value-type="string" calcext:value-type="string">
            <text:p>NIMIT PANW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325" calcext:value-type="float">
            <text:p>2022325</text:p>
          </table:table-cell>
          <table:table-cell office:value-type="string" calcext:value-type="string">
            <text:p>NIPUN KOTHARI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23" calcext:value-type="float">
            <text:p>2022323</text:p>
          </table:table-cell>
          <table:table-cell office:value-type="string" calcext:value-type="string">
            <text:p>NIKITA BHATI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326" calcext:value-type="float">
            <text:p>2022326</text:p>
          </table:table-cell>
          <table:table-cell office:value-type="string" calcext:value-type="string">
            <text:p>NISHANT KUMAR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327" calcext:value-type="float">
            <text:p>2022327</text:p>
          </table:table-cell>
          <table:table-cell office:value-type="string" calcext:value-type="string">
            <text:p>NISHANT KUMAR SINGH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328" calcext:value-type="float">
            <text:p>2022328</text:p>
          </table:table-cell>
          <table:table-cell office:value-type="string" calcext:value-type="string">
            <text:p>NISHANT SINGH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321" calcext:value-type="float">
            <text:p>2022321</text:p>
          </table:table-cell>
          <table:table-cell office:value-type="string" calcext:value-type="string">
            <text:p>NIKHI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30" calcext:value-type="float">
            <text:p>2022330</text:p>
          </table:table-cell>
          <table:table-cell office:value-type="string" calcext:value-type="string">
            <text:p>NISHCHAL GAUR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31" calcext:value-type="float">
            <text:p>2022331</text:p>
          </table:table-cell>
          <table:table-cell office:value-type="string" calcext:value-type="string">
            <text:p>NISHCHAY SHARM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22" calcext:value-type="float">
            <text:p>2022322</text:p>
          </table:table-cell>
          <table:table-cell office:value-type="string" calcext:value-type="string">
            <text:p>NIKHIL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29" calcext:value-type="float">
            <text:p>2022329</text:p>
          </table:table-cell>
          <table:table-cell office:value-type="string" calcext:value-type="string">
            <text:p>NISHANT YADAV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34" calcext:value-type="float">
            <text:p>2022334</text:p>
          </table:table-cell>
          <table:table-cell office:value-type="string" calcext:value-type="string">
            <text:p>NISHIL AGARWA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32" calcext:value-type="float">
            <text:p>2022332</text:p>
          </table:table-cell>
          <table:table-cell office:value-type="string" calcext:value-type="string">
            <text:p>NISHCHAY YADAV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33" calcext:value-type="float">
            <text:p>2022333</text:p>
          </table:table-cell>
          <table:table-cell office:value-type="string" calcext:value-type="string">
            <text:p>NISHCHAYA ROY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335" calcext:value-type="float">
            <text:p>2022335</text:p>
          </table:table-cell>
          <table:table-cell office:value-type="string" calcext:value-type="string">
            <text:p>NISHITA BHARAT LOHAN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39" calcext:value-type="float">
            <text:p>2022339</text:p>
          </table:table-cell>
          <table:table-cell office:value-type="string" calcext:value-type="string">
            <text:p>NOORAIN ANSARI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40" calcext:value-type="float">
            <text:p>2022340</text:p>
          </table:table-cell>
          <table:table-cell office:value-type="string" calcext:value-type="string">
            <text:p>NOOTAN SHARMA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338" calcext:value-type="float">
            <text:p>2022338</text:p>
          </table:table-cell>
          <table:table-cell office:value-type="string" calcext:value-type="string">
            <text:p>NOEL ABRAHAM TIJU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41" calcext:value-type="float">
            <text:p>2022341</text:p>
          </table:table-cell>
          <table:table-cell office:value-type="string" calcext:value-type="string">
            <text:p>NUTAN KUMARI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42" calcext:value-type="float">
            <text:p>2022342</text:p>
          </table:table-cell>
          <table:table-cell office:value-type="string" calcext:value-type="string">
            <text:p>OMANSH AROR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36" calcext:value-type="float">
            <text:p>2022336</text:p>
          </table:table-cell>
          <table:table-cell office:value-type="string" calcext:value-type="string">
            <text:p>NITEEN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44" calcext:value-type="float">
            <text:p>2022344</text:p>
          </table:table-cell>
          <table:table-cell office:value-type="string" calcext:value-type="string">
            <text:p>PALAK BHARDWAJ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37" calcext:value-type="float">
            <text:p>2022337</text:p>
          </table:table-cell>
          <table:table-cell office:value-type="string" calcext:value-type="string">
            <text:p>NITIN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46" calcext:value-type="float">
            <text:p>2022346</text:p>
          </table:table-cell>
          <table:table-cell office:value-type="string" calcext:value-type="string">
            <text:p>PANKAJ KUMAR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47" calcext:value-type="float">
            <text:p>2022347</text:p>
          </table:table-cell>
          <table:table-cell office:value-type="string" calcext:value-type="string">
            <text:p>PANKAJ YADAV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348" calcext:value-type="float">
            <text:p>2022348</text:p>
          </table:table-cell>
          <table:table-cell office:value-type="string" calcext:value-type="string">
            <text:p>PANKHURI SING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49" calcext:value-type="float">
            <text:p>2022349</text:p>
          </table:table-cell>
          <table:table-cell office:value-type="string" calcext:value-type="string">
            <text:p>PARAS KAKRA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50" calcext:value-type="float">
            <text:p>2022350</text:p>
          </table:table-cell>
          <table:table-cell office:value-type="string" calcext:value-type="string">
            <text:p>PARAS VERM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51" calcext:value-type="float">
            <text:p>2022351</text:p>
          </table:table-cell>
          <table:table-cell office:value-type="string" calcext:value-type="string">
            <text:p>PARTH GARG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43" calcext:value-type="float">
            <text:p>2022343</text:p>
          </table:table-cell>
          <table:table-cell office:value-type="string" calcext:value-type="string">
            <text:p>PAARTH GOY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53" calcext:value-type="float">
            <text:p>2022353</text:p>
          </table:table-cell>
          <table:table-cell office:value-type="string" calcext:value-type="string">
            <text:p>PARTH YADAV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354" calcext:value-type="float">
            <text:p>2022354</text:p>
          </table:table-cell>
          <table:table-cell office:value-type="string" calcext:value-type="string">
            <text:p>PIYUSH NARULA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355" calcext:value-type="float">
            <text:p>2022355</text:p>
          </table:table-cell>
          <table:table-cell office:value-type="string" calcext:value-type="string">
            <text:p>PIYUSH RAJ</text:p>
          </table:table-cell>
          <table:table-cell office:value-type="string" calcext:value-type="string">
            <text:p>CSB</text:p>
          </table:table-cell>
        </table:table-row>
        <table:table-row table:style-name="ro2">
          <table:table-cell office:value-type="float" office:value="2022356" calcext:value-type="float">
            <text:p>2022356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57" calcext:value-type="float">
            <text:p>2022357</text:p>
          </table:table-cell>
          <table:table-cell office:value-type="string" calcext:value-type="string">
            <text:p>PRABAL MINOTR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58" calcext:value-type="float">
            <text:p>2022358</text:p>
          </table:table-cell>
          <table:table-cell office:value-type="string" calcext:value-type="string">
            <text:p>PRADDUME ATTRI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360" calcext:value-type="float">
            <text:p>2022360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61" calcext:value-type="float">
            <text:p>2022361</text:p>
          </table:table-cell>
          <table:table-cell office:value-type="string" calcext:value-type="string">
            <text:p>PRAKHAR AGRAWAL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359" calcext:value-type="float">
            <text:p>2022359</text:p>
          </table:table-cell>
          <table:table-cell office:value-type="string" calcext:value-type="string">
            <text:p>PRAJIL BHAGAT</text:p>
          </table:table-cell>
          <table:table-cell office:value-type="string" calcext:value-type="string">
            <text:p>CSE</text:p>
          </table:table-cell>
        </table:table-row>
        <table:table-row table:style-name="ro4">
          <table:table-cell office:value-type="float" office:value="2022345" calcext:value-type="float">
            <text:p>2022345</text:p>
          </table:table-cell>
          <table:table-cell office:value-type="string" calcext:value-type="string">
            <text:p>PANDILLAPELLY HARSHVARDHINI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352" calcext:value-type="float">
            <text:p>2022352</text:p>
          </table:table-cell>
          <table:table-cell office:value-type="string" calcext:value-type="string">
            <text:p>PARTH SANDEEP RASTOG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62" calcext:value-type="float">
            <text:p>2022362</text:p>
          </table:table-cell>
          <table:table-cell office:value-type="string" calcext:value-type="string">
            <text:p>PRAKRITI JAIN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65" calcext:value-type="float">
            <text:p>2022365</text:p>
          </table:table-cell>
          <table:table-cell office:value-type="string" calcext:value-type="string">
            <text:p>PRANAV JAIN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66" calcext:value-type="float">
            <text:p>2022366</text:p>
          </table:table-cell>
          <table:table-cell office:value-type="string" calcext:value-type="string">
            <text:p>PRANAV KAPOOR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363" calcext:value-type="float">
            <text:p>2022363</text:p>
          </table:table-cell>
          <table:table-cell office:value-type="string" calcext:value-type="string">
            <text:p>PRANAV BHARADWAJ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69" calcext:value-type="float">
            <text:p>2022369</text:p>
          </table:table-cell>
          <table:table-cell office:value-type="string" calcext:value-type="string">
            <text:p>PRANSHU GOE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67" calcext:value-type="float">
            <text:p>2022367</text:p>
          </table:table-cell>
          <table:table-cell office:value-type="string" calcext:value-type="string">
            <text:p>PRANAV KAUL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371" calcext:value-type="float">
            <text:p>2022371</text:p>
          </table:table-cell>
          <table:table-cell office:value-type="string" calcext:value-type="string">
            <text:p>PRASHI JAIN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72" calcext:value-type="float">
            <text:p>2022372</text:p>
          </table:table-cell>
          <table:table-cell office:value-type="string" calcext:value-type="string">
            <text:p>PRATHAM GAUTAM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73" calcext:value-type="float">
            <text:p>2022373</text:p>
          </table:table-cell>
          <table:table-cell office:value-type="string" calcext:value-type="string">
            <text:p>PRATHAM MITTAL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76" calcext:value-type="float">
            <text:p>2022376</text:p>
          </table:table-cell>
          <table:table-cell office:value-type="string" calcext:value-type="string">
            <text:p>PRAVAR PATHANI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377" calcext:value-type="float">
            <text:p>2022377</text:p>
          </table:table-cell>
          <table:table-cell office:value-type="string" calcext:value-type="string">
            <text:p>PRAYAG PARASHA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74" calcext:value-type="float">
            <text:p>2022374</text:p>
          </table:table-cell>
          <table:table-cell office:value-type="string" calcext:value-type="string">
            <text:p>PRATHAM SIBAL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375" calcext:value-type="float">
            <text:p>2022375</text:p>
          </table:table-cell>
          <table:table-cell office:value-type="string" calcext:value-type="string">
            <text:p>PRATYUSH GUPT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364" calcext:value-type="float">
            <text:p>2022364</text:p>
          </table:table-cell>
          <table:table-cell office:value-type="string" calcext:value-type="string">
            <text:p>PRANAV GUPT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79" calcext:value-type="float">
            <text:p>2022379</text:p>
          </table:table-cell>
          <table:table-cell office:value-type="string" calcext:value-type="string">
            <text:p>PRINCE YADAV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81" calcext:value-type="float">
            <text:p>2022381</text:p>
          </table:table-cell>
          <table:table-cell office:value-type="string" calcext:value-type="string">
            <text:p>PRITHU RAJ SINGH</text:p>
          </table:table-cell>
          <table:table-cell office:value-type="string" calcext:value-type="string">
            <text:p>CSSS</text:p>
          </table:table-cell>
        </table:table-row>
        <table:table-row table:style-name="ro2">
          <table:table-cell office:value-type="float" office:value="2022382" calcext:value-type="float">
            <text:p>2022382</text:p>
          </table:table-cell>
          <table:table-cell office:value-type="string" calcext:value-type="string">
            <text:p>PRIYANSHU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380" calcext:value-type="float">
            <text:p>2022380</text:p>
          </table:table-cell>
          <table:table-cell office:value-type="string" calcext:value-type="string">
            <text:p>PRITHA PAWAN SHARM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68" calcext:value-type="float">
            <text:p>2022368</text:p>
          </table:table-cell>
          <table:table-cell office:value-type="string" calcext:value-type="string">
            <text:p>PRANAV TANW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84" calcext:value-type="float">
            <text:p>2022384</text:p>
          </table:table-cell>
          <table:table-cell office:value-type="string" calcext:value-type="string">
            <text:p>RACHIT AROR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85" calcext:value-type="float">
            <text:p>2022385</text:p>
          </table:table-cell>
          <table:table-cell office:value-type="string" calcext:value-type="string">
            <text:p>RAGHAV WADHW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386" calcext:value-type="float">
            <text:p>2022386</text:p>
          </table:table-cell>
          <table:table-cell office:value-type="string" calcext:value-type="string">
            <text:p>RAGHU KUM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87" calcext:value-type="float">
            <text:p>2022387</text:p>
          </table:table-cell>
          <table:table-cell office:value-type="string" calcext:value-type="string">
            <text:p>RAHUL BHARTI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88" calcext:value-type="float">
            <text:p>2022388</text:p>
          </table:table-cell>
          <table:table-cell office:value-type="string" calcext:value-type="string">
            <text:p>RAHUL GOEL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78" calcext:value-type="float">
            <text:p>2022378</text:p>
          </table:table-cell>
          <table:table-cell office:value-type="string" calcext:value-type="string">
            <text:p>PRINCE KUM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91" calcext:value-type="float">
            <text:p>2022391</text:p>
          </table:table-cell>
          <table:table-cell office:value-type="string" calcext:value-type="string">
            <text:p>RAHUL KUMAR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393" calcext:value-type="float">
            <text:p>2022393</text:p>
          </table:table-cell>
          <table:table-cell office:value-type="string" calcext:value-type="string">
            <text:p>RAIMA AGGARWA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90" calcext:value-type="float">
            <text:p>2022390</text:p>
          </table:table-cell>
          <table:table-cell office:value-type="string" calcext:value-type="string">
            <text:p>RAHUL KUM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395" calcext:value-type="float">
            <text:p>2022395</text:p>
          </table:table-cell>
          <table:table-cell office:value-type="string" calcext:value-type="string">
            <text:p>RAMISH JAMAL</text:p>
          </table:table-cell>
          <table:table-cell office:value-type="string" calcext:value-type="string">
            <text:p>CSSS</text:p>
          </table:table-cell>
        </table:table-row>
        <table:table-row table:style-name="ro3">
          <table:table-cell office:value-type="float" office:value="2022392" calcext:value-type="float">
            <text:p>2022392</text:p>
          </table:table-cell>
          <table:table-cell office:value-type="string" calcext:value-type="string">
            <text:p>RAHUL RAMESH OMALU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397" calcext:value-type="float">
            <text:p>2022397</text:p>
          </table:table-cell>
          <table:table-cell office:value-type="string" calcext:value-type="string">
            <text:p>RATNANGO GHOS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398" calcext:value-type="float">
            <text:p>2022398</text:p>
          </table:table-cell>
          <table:table-cell office:value-type="string" calcext:value-type="string">
            <text:p>RAVADA SATYADEV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400" calcext:value-type="float">
            <text:p>2022400</text:p>
          </table:table-cell>
          <table:table-cell office:value-type="string" calcext:value-type="string">
            <text:p>RIJUSMIT BISWAS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383" calcext:value-type="float">
            <text:p>2022383</text:p>
          </table:table-cell>
          <table:table-cell office:value-type="string" calcext:value-type="string">
            <text:p>PRIYANSHU YADAV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399" calcext:value-type="float">
            <text:p>2022399</text:p>
          </table:table-cell>
          <table:table-cell office:value-type="string" calcext:value-type="string">
            <text:p>RAYYAN HUSSAI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02" calcext:value-type="float">
            <text:p>2022402</text:p>
          </table:table-cell>
          <table:table-cell office:value-type="string" calcext:value-type="string">
            <text:p>RISHABH KUMAR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389" calcext:value-type="float">
            <text:p>2022389</text:p>
          </table:table-cell>
          <table:table-cell office:value-type="string" calcext:value-type="string">
            <text:p>RAHUL JH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06" calcext:value-type="float">
            <text:p>2022406</text:p>
          </table:table-cell>
          <table:table-cell office:value-type="string" calcext:value-type="string">
            <text:p>RISHIT GUPT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03" calcext:value-type="float">
            <text:p>2022403</text:p>
          </table:table-cell>
          <table:table-cell office:value-type="string" calcext:value-type="string">
            <text:p>RISHI PENDYAL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04" calcext:value-type="float">
            <text:p>2022404</text:p>
          </table:table-cell>
          <table:table-cell office:value-type="string" calcext:value-type="string">
            <text:p>RISHIMA CHADHA</text:p>
          </table:table-cell>
          <table:table-cell office:value-type="string" calcext:value-type="string">
            <text:p>CSD</text:p>
          </table:table-cell>
        </table:table-row>
        <table:table-row table:style-name="ro3">
          <table:table-cell office:value-type="float" office:value="2022407" calcext:value-type="float">
            <text:p>2022407</text:p>
          </table:table-cell>
          <table:table-cell office:value-type="string" calcext:value-type="string">
            <text:p>RITESH KUMAR PARIH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408" calcext:value-type="float">
            <text:p>2022408</text:p>
          </table:table-cell>
          <table:table-cell office:value-type="string" calcext:value-type="string">
            <text:p>RITIKA THAKU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401" calcext:value-type="float">
            <text:p>2022401</text:p>
          </table:table-cell>
          <table:table-cell office:value-type="string" calcext:value-type="string">
            <text:p>RISHABH JAY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410" calcext:value-type="float">
            <text:p>2022410</text:p>
          </table:table-cell>
          <table:table-cell office:value-type="string" calcext:value-type="string">
            <text:p>RIYA GUPT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11" calcext:value-type="float">
            <text:p>2022411</text:p>
          </table:table-cell>
          <table:table-cell office:value-type="string" calcext:value-type="string">
            <text:p>RIYA SACHDEVA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405" calcext:value-type="float">
            <text:p>2022405</text:p>
          </table:table-cell>
          <table:table-cell office:value-type="string" calcext:value-type="string">
            <text:p>RISHIT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09" calcext:value-type="float">
            <text:p>2022409</text:p>
          </table:table-cell>
          <table:table-cell office:value-type="string" calcext:value-type="string">
            <text:p>RITVIEK PADD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14" calcext:value-type="float">
            <text:p>2022414</text:p>
          </table:table-cell>
          <table:table-cell office:value-type="string" calcext:value-type="string">
            <text:p>ROHAN DEVGO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15" calcext:value-type="float">
            <text:p>2022415</text:p>
          </table:table-cell>
          <table:table-cell office:value-type="string" calcext:value-type="string">
            <text:p>ROHAN INDORA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416" calcext:value-type="float">
            <text:p>2022416</text:p>
          </table:table-cell>
          <table:table-cell office:value-type="string" calcext:value-type="string">
            <text:p>ROHAN SUDHIR BASUGADE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12" calcext:value-type="float">
            <text:p>2022412</text:p>
          </table:table-cell>
          <table:table-cell office:value-type="string" calcext:value-type="string">
            <text:p>ROHAK KANSAL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418" calcext:value-type="float">
            <text:p>2022418</text:p>
          </table:table-cell>
          <table:table-cell office:value-type="string" calcext:value-type="string">
            <text:p>ROSHAN KUMAR MAHTO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419" calcext:value-type="float">
            <text:p>2022419</text:p>
          </table:table-cell>
          <table:table-cell office:value-type="string" calcext:value-type="string">
            <text:p>RUCHIR BHATOWA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420" calcext:value-type="float">
            <text:p>2022420</text:p>
          </table:table-cell>
          <table:table-cell office:value-type="string" calcext:value-type="string">
            <text:p>RUDRA PRATAP SINGH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421" calcext:value-type="float">
            <text:p>2022421</text:p>
          </table:table-cell>
          <table:table-cell office:value-type="string" calcext:value-type="string">
            <text:p>SAARTHAK SAXEN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22" calcext:value-type="float">
            <text:p>2022422</text:p>
          </table:table-cell>
          <table:table-cell office:value-type="string" calcext:value-type="string">
            <text:p>SACHIN GUPT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423" calcext:value-type="float">
            <text:p>2022423</text:p>
          </table:table-cell>
          <table:table-cell office:value-type="string" calcext:value-type="string">
            <text:p>SACHIN KUMAR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424" calcext:value-type="float">
            <text:p>2022424</text:p>
          </table:table-cell>
          <table:table-cell office:value-type="string" calcext:value-type="string">
            <text:p>SACHIN MAURY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13" calcext:value-type="float">
            <text:p>2022413</text:p>
          </table:table-cell>
          <table:table-cell office:value-type="string" calcext:value-type="string">
            <text:p>ROHAN BERI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17" calcext:value-type="float">
            <text:p>2022417</text:p>
          </table:table-cell>
          <table:table-cell office:value-type="string" calcext:value-type="string">
            <text:p>ROHIT SING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25" calcext:value-type="float">
            <text:p>2022425</text:p>
          </table:table-cell>
          <table:table-cell office:value-type="string" calcext:value-type="string">
            <text:p>SAGNIK JAN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30" calcext:value-type="float">
            <text:p>2022430</text:p>
          </table:table-cell>
          <table:table-cell office:value-type="string" calcext:value-type="string">
            <text:p>SAHIL GUPTA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427" calcext:value-type="float">
            <text:p>202242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32" calcext:value-type="float">
            <text:p>2022432</text:p>
          </table:table-cell>
          <table:table-cell office:value-type="string" calcext:value-type="string">
            <text:p>SAKSHAM KUMAR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33" calcext:value-type="float">
            <text:p>2022433</text:p>
          </table:table-cell>
          <table:table-cell office:value-type="string" calcext:value-type="string">
            <text:p>SAKSHAM SAINI</text:p>
          </table:table-cell>
          <table:table-cell office:value-type="string" calcext:value-type="string">
            <text:p>CSB</text:p>
          </table:table-cell>
        </table:table-row>
        <table:table-row table:style-name="ro2">
          <table:table-cell office:value-type="float" office:value="2022428" calcext:value-type="float">
            <text:p>2022428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35" calcext:value-type="float">
            <text:p>2022435</text:p>
          </table:table-cell>
          <table:table-cell office:value-type="string" calcext:value-type="string">
            <text:p>SAMBHAV GAUTAM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36" calcext:value-type="float">
            <text:p>2022436</text:p>
          </table:table-cell>
          <table:table-cell office:value-type="string" calcext:value-type="string">
            <text:p>SAMBHAV SINGH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37" calcext:value-type="float">
            <text:p>2022437</text:p>
          </table:table-cell>
          <table:table-cell office:value-type="string" calcext:value-type="string">
            <text:p>SAMEER ALAM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438" calcext:value-type="float">
            <text:p>2022438</text:p>
          </table:table-cell>
          <table:table-cell office:value-type="string" calcext:value-type="string">
            <text:p>SAMEER KHAN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439" calcext:value-type="float">
            <text:p>2022439</text:p>
          </table:table-cell>
          <table:table-cell office:value-type="string" calcext:value-type="string">
            <text:p>SAMEER SINGH GODAR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41" calcext:value-type="float">
            <text:p>2022441</text:p>
          </table:table-cell>
          <table:table-cell office:value-type="string" calcext:value-type="string">
            <text:p>SAMRIDH GUPT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442" calcext:value-type="float">
            <text:p>2022442</text:p>
          </table:table-cell>
          <table:table-cell office:value-type="string" calcext:value-type="string">
            <text:p>SAMYAK MEHTA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443" calcext:value-type="float">
            <text:p>2022443</text:p>
          </table:table-cell>
          <table:table-cell office:value-type="string" calcext:value-type="string">
            <text:p>SANGAY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444" calcext:value-type="float">
            <text:p>2022444</text:p>
          </table:table-cell>
          <table:table-cell office:value-type="string" calcext:value-type="string">
            <text:p>SANJEET KUMAR PATEL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445" calcext:value-type="float">
            <text:p>2022445</text:p>
          </table:table-cell>
          <table:table-cell office:value-type="string" calcext:value-type="string">
            <text:p>SANKALP RAJ</text:p>
          </table:table-cell>
          <table:table-cell office:value-type="string" calcext:value-type="string">
            <text:p>CSSS</text:p>
          </table:table-cell>
        </table:table-row>
        <table:table-row table:style-name="ro2">
          <table:table-cell office:value-type="float" office:value="2022446" calcext:value-type="float">
            <text:p>2022446</text:p>
          </table:table-cell>
          <table:table-cell office:value-type="string" calcext:value-type="string">
            <text:p>SANKIT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47" calcext:value-type="float">
            <text:p>2022447</text:p>
          </table:table-cell>
          <table:table-cell office:value-type="string" calcext:value-type="string">
            <text:p>SANYAM B KUMAR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48" calcext:value-type="float">
            <text:p>2022448</text:p>
          </table:table-cell>
          <table:table-cell office:value-type="string" calcext:value-type="string">
            <text:p>SANYAM GARG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31" calcext:value-type="float">
            <text:p>2022431</text:p>
          </table:table-cell>
          <table:table-cell office:value-type="string" calcext:value-type="string">
            <text:p>SAKSHAM KAPOO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34" calcext:value-type="float">
            <text:p>2022434</text:p>
          </table:table-cell>
          <table:table-cell office:value-type="string" calcext:value-type="string">
            <text:p>SAKSHAM SINGH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449" calcext:value-type="float">
            <text:p>2022449</text:p>
          </table:table-cell>
          <table:table-cell office:value-type="string" calcext:value-type="string">
            <text:p>SARATH CHANDRA GODITH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53" calcext:value-type="float">
            <text:p>2022453</text:p>
          </table:table-cell>
          <table:table-cell office:value-type="string" calcext:value-type="string">
            <text:p>SARTHAK KANDPA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55" calcext:value-type="float">
            <text:p>2022455</text:p>
          </table:table-cell>
          <table:table-cell office:value-type="string" calcext:value-type="string">
            <text:p>SARTHAK RAJ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56" calcext:value-type="float">
            <text:p>2022456</text:p>
          </table:table-cell>
          <table:table-cell office:value-type="string" calcext:value-type="string">
            <text:p>SARTHAK SHARM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57" calcext:value-type="float">
            <text:p>2022457</text:p>
          </table:table-cell>
          <table:table-cell office:value-type="string" calcext:value-type="string">
            <text:p>SARTHAK SINGH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458" calcext:value-type="float">
            <text:p>2022458</text:p>
          </table:table-cell>
          <table:table-cell office:value-type="string" calcext:value-type="string">
            <text:p>SARTHAK SRIVASTAV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459" calcext:value-type="float">
            <text:p>2022459</text:p>
          </table:table-cell>
          <table:table-cell office:value-type="string" calcext:value-type="string">
            <text:p>SATKEERAT SINGH KHOKHAR</text:p>
          </table:table-cell>
          <table:table-cell office:value-type="string" calcext:value-type="string">
            <text:p>CSB</text:p>
          </table:table-cell>
        </table:table-row>
        <table:table-row table:style-name="ro3">
          <table:table-cell office:value-type="float" office:value="2022450" calcext:value-type="float">
            <text:p>2022450</text:p>
          </table:table-cell>
          <table:table-cell office:value-type="string" calcext:value-type="string">
            <text:p>SARGUN SINGH KHURANA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462" calcext:value-type="float">
            <text:p>2022462</text:p>
          </table:table-cell>
          <table:table-cell office:value-type="string" calcext:value-type="string">
            <text:p>SATYAM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60" calcext:value-type="float">
            <text:p>2022460</text:p>
          </table:table-cell>
          <table:table-cell office:value-type="string" calcext:value-type="string">
            <text:p>SATVIK FOTEDAR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63" calcext:value-type="float">
            <text:p>2022463</text:p>
          </table:table-cell>
          <table:table-cell office:value-type="string" calcext:value-type="string">
            <text:p>SATYAM PANDEY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51" calcext:value-type="float">
            <text:p>2022451</text:p>
          </table:table-cell>
          <table:table-cell office:value-type="string" calcext:value-type="string">
            <text:p>SARTHAK GUPT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66" calcext:value-type="float">
            <text:p>2022466</text:p>
          </table:table-cell>
          <table:table-cell office:value-type="string" calcext:value-type="string">
            <text:p>SHAGUN YADAV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461" calcext:value-type="float">
            <text:p>2022461</text:p>
          </table:table-cell>
          <table:table-cell office:value-type="string" calcext:value-type="string">
            <text:p>SATWIK GARG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65" calcext:value-type="float">
            <text:p>2022465</text:p>
          </table:table-cell>
          <table:table-cell office:value-type="string" calcext:value-type="string">
            <text:p>SAURAV MEHR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68" calcext:value-type="float">
            <text:p>2022468</text:p>
          </table:table-cell>
          <table:table-cell office:value-type="string" calcext:value-type="string">
            <text:p>SHAMIK SINH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464" calcext:value-type="float">
            <text:p>2022464</text:p>
          </table:table-cell>
          <table:table-cell office:value-type="string" calcext:value-type="string">
            <text:p>SAURAV HALDAR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71" calcext:value-type="float">
            <text:p>2022471</text:p>
          </table:table-cell>
          <table:table-cell office:value-type="string" calcext:value-type="string">
            <text:p>SHASHWAT CHANDR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472" calcext:value-type="float">
            <text:p>2022472</text:p>
          </table:table-cell>
          <table:table-cell office:value-type="string" calcext:value-type="string">
            <text:p>SHASHWAT JH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473" calcext:value-type="float">
            <text:p>2022473</text:p>
          </table:table-cell>
          <table:table-cell office:value-type="string" calcext:value-type="string">
            <text:p>SHASHWAT SHEKHAR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469" calcext:value-type="float">
            <text:p>2022469</text:p>
          </table:table-cell>
          <table:table-cell office:value-type="string" calcext:value-type="string">
            <text:p>SHASHANK GADAMSETTY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77" calcext:value-type="float">
            <text:p>2022477</text:p>
          </table:table-cell>
          <table:table-cell office:value-type="string" calcext:value-type="string">
            <text:p>SHIVAM PANDEY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478" calcext:value-type="float">
            <text:p>2022478</text:p>
          </table:table-cell>
          <table:table-cell office:value-type="string" calcext:value-type="string">
            <text:p>SHIVAM SHUKLA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479" calcext:value-type="float">
            <text:p>2022479</text:p>
          </table:table-cell>
          <table:table-cell office:value-type="string" calcext:value-type="string">
            <text:p>SHIVANKAR SRIJAN SINGH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481" calcext:value-type="float">
            <text:p>2022481</text:p>
          </table:table-cell>
          <table:table-cell office:value-type="string" calcext:value-type="string">
            <text:p>SHIVKANT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74" calcext:value-type="float">
            <text:p>2022474</text:p>
          </table:table-cell>
          <table:table-cell office:value-type="string" calcext:value-type="string">
            <text:p>SHAURYA BAJAJ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83" calcext:value-type="float">
            <text:p>2022483</text:p>
          </table:table-cell>
          <table:table-cell office:value-type="string" calcext:value-type="string">
            <text:p>SHREY YAD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84" calcext:value-type="float">
            <text:p>2022484</text:p>
          </table:table-cell>
          <table:table-cell office:value-type="string" calcext:value-type="string">
            <text:p>SHREYANSH SETH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85" calcext:value-type="float">
            <text:p>2022485</text:p>
          </table:table-cell>
          <table:table-cell office:value-type="string" calcext:value-type="string">
            <text:p>SHREYANSH SRIVAST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75" calcext:value-type="float">
            <text:p>2022475</text:p>
          </table:table-cell>
          <table:table-cell office:value-type="string" calcext:value-type="string">
            <text:p>SHAURYA PARASHAR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488" calcext:value-type="float">
            <text:p>2022488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490" calcext:value-type="float">
            <text:p>2022490</text:p>
          </table:table-cell>
          <table:table-cell office:value-type="string" calcext:value-type="string">
            <text:p>SHUBHAM GOEL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482" calcext:value-type="float">
            <text:p>2022482</text:p>
          </table:table-cell>
          <table:table-cell office:value-type="string" calcext:value-type="string">
            <text:p>SHOBHIT RAJ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92" calcext:value-type="float">
            <text:p>2022492</text:p>
          </table:table-cell>
          <table:table-cell office:value-type="string" calcext:value-type="string">
            <text:p>SHUBHAM GOL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93" calcext:value-type="float">
            <text:p>2022493</text:p>
          </table:table-cell>
          <table:table-cell office:value-type="string" calcext:value-type="string">
            <text:p>SHUBHAM GUPTA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494" calcext:value-type="float">
            <text:p>2022494</text:p>
          </table:table-cell>
          <table:table-cell office:value-type="string" calcext:value-type="string">
            <text:p>SHUBHAM KUMAR DWIVEDI</text:p>
          </table:table-cell>
          <table:table-cell office:value-type="string" calcext:value-type="string">
            <text:p>CSB</text:p>
          </table:table-cell>
        </table:table-row>
        <table:table-row table:style-name="ro3">
          <table:table-cell office:value-type="float" office:value="2022495" calcext:value-type="float">
            <text:p>2022495</text:p>
          </table:table-cell>
          <table:table-cell office:value-type="string" calcext:value-type="string">
            <text:p>SIDAK SINGH CHAHAL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96" calcext:value-type="float">
            <text:p>2022496</text:p>
          </table:table-cell>
          <table:table-cell office:value-type="string" calcext:value-type="string">
            <text:p>SIDDHANT BALI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487" calcext:value-type="float">
            <text:p>2022487</text:p>
          </table:table-cell>
          <table:table-cell office:value-type="string" calcext:value-type="string">
            <text:p>SHRUTYA CHAWL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498" calcext:value-type="float">
            <text:p>2022498</text:p>
          </table:table-cell>
          <table:table-cell office:value-type="string" calcext:value-type="string">
            <text:p>SIDDHARTH BHASK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491" calcext:value-type="float">
            <text:p>2022491</text:p>
          </table:table-cell>
          <table:table-cell office:value-type="string" calcext:value-type="string">
            <text:p>SHUBHAM GOEL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500" calcext:value-type="float">
            <text:p>2022500</text:p>
          </table:table-cell>
          <table:table-cell office:value-type="string" calcext:value-type="string">
            <text:p>SIRIKAEW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01" calcext:value-type="float">
            <text:p>2022501</text:p>
          </table:table-cell>
          <table:table-cell office:value-type="string" calcext:value-type="string">
            <text:p>SNEHA AGARWAL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02" calcext:value-type="float">
            <text:p>2022502</text:p>
          </table:table-cell>
          <table:table-cell office:value-type="string" calcext:value-type="string">
            <text:p>SNEHA NAGPAL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497" calcext:value-type="float">
            <text:p>2022497</text:p>
          </table:table-cell>
          <table:table-cell office:value-type="string" calcext:value-type="string">
            <text:p>SIDDHANT SINGH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04" calcext:value-type="float">
            <text:p>2022504</text:p>
          </table:table-cell>
          <table:table-cell office:value-type="string" calcext:value-type="string">
            <text:p>SOHAM GHOSH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05" calcext:value-type="float">
            <text:p>2022505</text:p>
          </table:table-cell>
          <table:table-cell office:value-type="string" calcext:value-type="string">
            <text:p>SOMAY JALAN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499" calcext:value-type="float">
            <text:p>2022499</text:p>
          </table:table-cell>
          <table:table-cell office:value-type="string" calcext:value-type="string">
            <text:p>SIDHARTHA GARG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507" calcext:value-type="float">
            <text:p>2022507</text:p>
          </table:table-cell>
          <table:table-cell office:value-type="string" calcext:value-type="string">
            <text:p>SOURABH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503" calcext:value-type="float">
            <text:p>2022503</text:p>
          </table:table-cell>
          <table:table-cell office:value-type="string" calcext:value-type="string">
            <text:p>SNEHIL JAIS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11" calcext:value-type="float">
            <text:p>2022511</text:p>
          </table:table-cell>
          <table:table-cell office:value-type="string" calcext:value-type="string">
            <text:p>SUHANI KALYANI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508" calcext:value-type="float">
            <text:p>2022508</text:p>
          </table:table-cell>
          <table:table-cell office:value-type="string" calcext:value-type="string">
            <text:p>SRICHARAN VEMPALLI REDDY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09" calcext:value-type="float">
            <text:p>2022509</text:p>
          </table:table-cell>
          <table:table-cell office:value-type="string" calcext:value-type="string">
            <text:p>STANZIN GYALPO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12" calcext:value-type="float">
            <text:p>2022512</text:p>
          </table:table-cell>
          <table:table-cell office:value-type="string" calcext:value-type="string">
            <text:p>SUJAL DAGUR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513" calcext:value-type="float">
            <text:p>2022513</text:p>
          </table:table-cell>
          <table:table-cell office:value-type="string" calcext:value-type="string">
            <text:p>SUJAL SONI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514" calcext:value-type="float">
            <text:p>2022514</text:p>
          </table:table-cell>
          <table:table-cell office:value-type="string" calcext:value-type="string">
            <text:p>SUJAL SURI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15" calcext:value-type="float">
            <text:p>2022515</text:p>
          </table:table-cell>
          <table:table-cell office:value-type="string" calcext:value-type="string">
            <text:p>SUMIT KUMAR</text:p>
          </table:table-cell>
          <table:table-cell office:value-type="string" calcext:value-type="string">
            <text:p>CSSS</text:p>
          </table:table-cell>
        </table:table-row>
        <table:table-row table:style-name="ro3">
          <table:table-cell office:value-type="float" office:value="2022517" calcext:value-type="float">
            <text:p>2022517</text:p>
          </table:table-cell>
          <table:table-cell office:value-type="string" calcext:value-type="string">
            <text:p>SURAT SATHI SAMANT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516" calcext:value-type="float">
            <text:p>2022516</text:p>
          </table:table-cell>
          <table:table-cell office:value-type="string" calcext:value-type="string">
            <text:p>SUNIL KUMA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19" calcext:value-type="float">
            <text:p>2022519</text:p>
          </table:table-cell>
          <table:table-cell office:value-type="string" calcext:value-type="string">
            <text:p>SURYANSH VARSHNEY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06" calcext:value-type="float">
            <text:p>2022506</text:p>
          </table:table-cell>
          <table:table-cell office:value-type="string" calcext:value-type="string">
            <text:p>SOUPARNO GHOSE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21" calcext:value-type="float">
            <text:p>2022521</text:p>
          </table:table-cell>
          <table:table-cell office:value-type="string" calcext:value-type="string">
            <text:p>SUVIT JOSHI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10" calcext:value-type="float">
            <text:p>2022510</text:p>
          </table:table-cell>
          <table:table-cell office:value-type="string" calcext:value-type="string">
            <text:p>SUBHAM MAURY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23" calcext:value-type="float">
            <text:p>2022523</text:p>
          </table:table-cell>
          <table:table-cell office:value-type="string" calcext:value-type="string">
            <text:p>SWAPNIL VERMA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525" calcext:value-type="float">
            <text:p>2022525</text:p>
          </table:table-cell>
          <table:table-cell office:value-type="string" calcext:value-type="string">
            <text:p>SWARNIMA PRASAD</text:p>
          </table:table-cell>
          <table:table-cell office:value-type="string" calcext:value-type="string">
            <text:p>CSD</text:p>
          </table:table-cell>
        </table:table-row>
        <table:table-row table:style-name="ro4">
          <table:table-cell office:value-type="float" office:value="2022524" calcext:value-type="float">
            <text:p>2022524</text:p>
          </table:table-cell>
          <table:table-cell office:value-type="string" calcext:value-type="string">
            <text:p>SWARA ASHWINKUMAR PAREKH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22" calcext:value-type="float">
            <text:p>2022522</text:p>
          </table:table-cell>
          <table:table-cell office:value-type="string" calcext:value-type="string">
            <text:p>SWAPNIL PANIGRAH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26" calcext:value-type="float">
            <text:p>2022526</text:p>
          </table:table-cell>
          <table:table-cell office:value-type="string" calcext:value-type="string">
            <text:p>SWAYAM GHANGHAS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30" calcext:value-type="float">
            <text:p>2022530</text:p>
          </table:table-cell>
          <table:table-cell office:value-type="string" calcext:value-type="string">
            <text:p>SYED YASSER ALI</text:p>
          </table:table-cell>
          <table:table-cell office:value-type="string" calcext:value-type="string">
            <text:p>CSB</text:p>
          </table:table-cell>
        </table:table-row>
        <table:table-row table:style-name="ro3">
          <table:table-cell office:value-type="float" office:value="2022528" calcext:value-type="float">
            <text:p>2022528</text:p>
          </table:table-cell>
          <table:table-cell office:value-type="string" calcext:value-type="string">
            <text:p>SYAM SAI SANTOSH BAND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32" calcext:value-type="float">
            <text:p>2022532</text:p>
          </table:table-cell>
          <table:table-cell office:value-type="string" calcext:value-type="string">
            <text:p>TANISH VERM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33" calcext:value-type="float">
            <text:p>2022533</text:p>
          </table:table-cell>
          <table:table-cell office:value-type="string" calcext:value-type="string">
            <text:p>TANISHQ DASS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34" calcext:value-type="float">
            <text:p>2022534</text:p>
          </table:table-cell>
          <table:table-cell office:value-type="string" calcext:value-type="string">
            <text:p>TANMAY KHATRI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35" calcext:value-type="float">
            <text:p>2022535</text:p>
          </table:table-cell>
          <table:table-cell office:value-type="string" calcext:value-type="string">
            <text:p>TANMAY SINGHAL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36" calcext:value-type="float">
            <text:p>2022536</text:p>
          </table:table-cell>
          <table:table-cell office:value-type="string" calcext:value-type="string">
            <text:p>TARANDEEP SINGH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37" calcext:value-type="float">
            <text:p>2022537</text:p>
          </table:table-cell>
          <table:table-cell office:value-type="string" calcext:value-type="string">
            <text:p>TARUSH GARG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538" calcext:value-type="float">
            <text:p>2022538</text:p>
          </table:table-cell>
          <table:table-cell office:value-type="string" calcext:value-type="string">
            <text:p>TEJAS JAISWAL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39" calcext:value-type="float">
            <text:p>2022539</text:p>
          </table:table-cell>
          <table:table-cell office:value-type="string" calcext:value-type="string">
            <text:p>TEJASH PRASAD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27" calcext:value-type="float">
            <text:p>2022527</text:p>
          </table:table-cell>
          <table:table-cell office:value-type="string" calcext:value-type="string">
            <text:p>SWETA SNIGDHA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544" calcext:value-type="float">
            <text:p>2022544</text:p>
          </table:table-cell>
          <table:table-cell office:value-type="string" calcext:value-type="string">
            <text:p>TUSHAR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540" calcext:value-type="float">
            <text:p>2022540</text:p>
          </table:table-cell>
          <table:table-cell office:value-type="string" calcext:value-type="string">
            <text:p>TEJUS MADAN</text:p>
          </table:table-cell>
          <table:table-cell office:value-type="string" calcext:value-type="string">
            <text:p>CSD</text:p>
          </table:table-cell>
        </table:table-row>
        <table:table-row table:style-name="ro4">
          <table:table-cell office:value-type="float" office:value="2022541" calcext:value-type="float">
            <text:p>2022541</text:p>
          </table:table-cell>
          <table:table-cell office:value-type="string" calcext:value-type="string">
            <text:p>THARUN HARISH GANESH KUMAR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542" calcext:value-type="float">
            <text:p>2022542</text:p>
          </table:table-cell>
          <table:table-cell office:value-type="string" calcext:value-type="string">
            <text:p>TIKAM CHAND MEEN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45" calcext:value-type="float">
            <text:p>2022545</text:p>
          </table:table-cell>
          <table:table-cell office:value-type="string" calcext:value-type="string">
            <text:p>TUSHAR AGRAWAL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546" calcext:value-type="float">
            <text:p>2022546</text:p>
          </table:table-cell>
          <table:table-cell office:value-type="string" calcext:value-type="string">
            <text:p>TUSHAR GUPT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48" calcext:value-type="float">
            <text:p>2022548</text:p>
          </table:table-cell>
          <table:table-cell office:value-type="string" calcext:value-type="string">
            <text:p>UDBHAV SINGH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549" calcext:value-type="float">
            <text:p>2022549</text:p>
          </table:table-cell>
          <table:table-cell office:value-type="string" calcext:value-type="string">
            <text:p>UDBHAV YADAV</text:p>
          </table:table-cell>
          <table:table-cell office:value-type="string" calcext:value-type="string">
            <text:p>ECE</text:p>
          </table:table-cell>
        </table:table-row>
        <table:table-row table:style-name="ro3">
          <table:table-cell office:value-type="float" office:value="2022547" calcext:value-type="float">
            <text:p>2022547</text:p>
          </table:table-cell>
          <table:table-cell office:value-type="string" calcext:value-type="string">
            <text:p>UDAY KUMAR SANGWAN</text:p>
          </table:table-cell>
          <table:table-cell office:value-type="string" calcext:value-type="string">
            <text:p>CSAM</text:p>
          </table:table-cell>
        </table:table-row>
        <table:table-row table:style-name="ro3">
          <table:table-cell office:value-type="float" office:value="2022550" calcext:value-type="float">
            <text:p>2022550</text:p>
          </table:table-cell>
          <table:table-cell office:value-type="string" calcext:value-type="string">
            <text:p>UTKARSH CHOUDHARY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529" calcext:value-type="float">
            <text:p>2022529</text:p>
          </table:table-cell>
          <table:table-cell office:value-type="string" calcext:value-type="string">
            <text:p>SYAMANTAK PALI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52" calcext:value-type="float">
            <text:p>2022552</text:p>
          </table:table-cell>
          <table:table-cell office:value-type="string" calcext:value-type="string">
            <text:p>VAIBHAV CHOPR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53" calcext:value-type="float">
            <text:p>2022553</text:p>
          </table:table-cell>
          <table:table-cell office:value-type="string" calcext:value-type="string">
            <text:p>VAIBHAV GUPTA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55" calcext:value-type="float">
            <text:p>2022555</text:p>
          </table:table-cell>
          <table:table-cell office:value-type="string" calcext:value-type="string">
            <text:p>VAIBHAV SINGH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556" calcext:value-type="float">
            <text:p>2022556</text:p>
          </table:table-cell>
          <table:table-cell office:value-type="string" calcext:value-type="string">
            <text:p>VAIBHAV TAPARIY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54" calcext:value-type="float">
            <text:p>2022554</text:p>
          </table:table-cell>
          <table:table-cell office:value-type="string" calcext:value-type="string">
            <text:p>VAIBHAV SEHAR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57" calcext:value-type="float">
            <text:p>2022557</text:p>
          </table:table-cell>
          <table:table-cell office:value-type="string" calcext:value-type="string">
            <text:p>VAIBHAV YADAV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58" calcext:value-type="float">
            <text:p>2022558</text:p>
          </table:table-cell>
          <table:table-cell office:value-type="string" calcext:value-type="string">
            <text:p>VANSH AGGAR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59" calcext:value-type="float">
            <text:p>2022559</text:p>
          </table:table-cell>
          <table:table-cell office:value-type="string" calcext:value-type="string">
            <text:p>VANSH YADAV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560" calcext:value-type="float">
            <text:p>2022560</text:p>
          </table:table-cell>
          <table:table-cell office:value-type="string" calcext:value-type="string">
            <text:p>VANSHIKA PAL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561" calcext:value-type="float">
            <text:p>2022561</text:p>
          </table:table-cell>
          <table:table-cell office:value-type="string" calcext:value-type="string">
            <text:p>VARIN KALA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62" calcext:value-type="float">
            <text:p>2022562</text:p>
          </table:table-cell>
          <table:table-cell office:value-type="string" calcext:value-type="string">
            <text:p>VARUN BHARTI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63" calcext:value-type="float">
            <text:p>2022563</text:p>
          </table:table-cell>
          <table:table-cell office:value-type="string" calcext:value-type="string">
            <text:p>VARUN KUMAR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64" calcext:value-type="float">
            <text:p>2022564</text:p>
          </table:table-cell>
          <table:table-cell office:value-type="string" calcext:value-type="string">
            <text:p>VATSAL GUPTA</text:p>
          </table:table-cell>
          <table:table-cell office:value-type="string" calcext:value-type="string">
            <text:p>ECE</text:p>
          </table:table-cell>
        </table:table-row>
        <table:table-row table:style-name="ro2">
          <table:table-cell office:value-type="float" office:value="2022543" calcext:value-type="float">
            <text:p>2022543</text:p>
          </table:table-cell>
          <table:table-cell office:value-type="string" calcext:value-type="string">
            <text:p>TIZI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67" calcext:value-type="float">
            <text:p>2022567</text:p>
          </table:table-cell>
          <table:table-cell office:value-type="string" calcext:value-type="string">
            <text:p>VIBHUTI MALHOTRA</text:p>
          </table:table-cell>
          <table:table-cell office:value-type="string" calcext:value-type="string">
            <text:p>CSSS</text:p>
          </table:table-cell>
        </table:table-row>
        <table:table-row table:style-name="ro4">
          <table:table-cell office:value-type="float" office:value="2022565" calcext:value-type="float">
            <text:p>2022565</text:p>
          </table:table-cell>
          <table:table-cell office:value-type="string" calcext:value-type="string">
            <text:p>VEDANG RAJENDRAKUMAR PATE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69" calcext:value-type="float">
            <text:p>2022569</text:p>
          </table:table-cell>
          <table:table-cell office:value-type="string" calcext:value-type="string">
            <text:p>VIJVAL EKBOTE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51" calcext:value-type="float">
            <text:p>2022551</text:p>
          </table:table-cell>
          <table:table-cell office:value-type="string" calcext:value-type="string">
            <text:p>UTKARSH DHILLIWAL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568" calcext:value-type="float">
            <text:p>2022568</text:p>
          </table:table-cell>
          <table:table-cell office:value-type="string" calcext:value-type="string">
            <text:p>VIDHAN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573" calcext:value-type="float">
            <text:p>2022573</text:p>
          </table:table-cell>
          <table:table-cell office:value-type="string" calcext:value-type="string">
            <text:p>VINAY KUMAR DUBEY</text:p>
          </table:table-cell>
          <table:table-cell office:value-type="string" calcext:value-type="string">
            <text:p>CSD</text:p>
          </table:table-cell>
        </table:table-row>
        <table:table-row table:style-name="ro3">
          <table:table-cell office:value-type="float" office:value="2022570" calcext:value-type="float">
            <text:p>2022570</text:p>
          </table:table-cell>
          <table:table-cell office:value-type="string" calcext:value-type="string">
            <text:p>VIKRANTH UDANDARAO</text:p>
          </table:table-cell>
          <table:table-cell office:value-type="string" calcext:value-type="string">
            <text:p>CSAI</text:p>
          </table:table-cell>
        </table:table-row>
        <table:table-row table:style-name="ro3">
          <table:table-cell office:value-type="float" office:value="2022571" calcext:value-type="float">
            <text:p>2022571</text:p>
          </table:table-cell>
          <table:table-cell office:value-type="string" calcext:value-type="string">
            <text:p>VIMAL JAYANT SUBBURAJ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574" calcext:value-type="float">
            <text:p>2022574</text:p>
          </table:table-cell>
          <table:table-cell office:value-type="string" calcext:value-type="string">
            <text:p>VINAYAK AGRAWAL</text:p>
          </table:table-cell>
          <table:table-cell office:value-type="string" calcext:value-type="string">
            <text:p>CSAI</text:p>
          </table:table-cell>
        </table:table-row>
        <table:table-row table:style-name="ro2">
          <table:table-cell office:value-type="float" office:value="2022575" calcext:value-type="float">
            <text:p>2022575</text:p>
          </table:table-cell>
          <table:table-cell office:value-type="string" calcext:value-type="string">
            <text:p>VINEET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66" calcext:value-type="float">
            <text:p>2022566</text:p>
          </table:table-cell>
          <table:table-cell office:value-type="string" calcext:value-type="string">
            <text:p>VEDIKA AGARWAL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72" calcext:value-type="float">
            <text:p>2022572</text:p>
          </table:table-cell>
          <table:table-cell office:value-type="string" calcext:value-type="string">
            <text:p>VIMANSH MAHAJAN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578" calcext:value-type="float">
            <text:p>2022578</text:p>
          </table:table-cell>
          <table:table-cell office:value-type="string" calcext:value-type="string">
            <text:p>VIRAT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576" calcext:value-type="float">
            <text:p>2022576</text:p>
          </table:table-cell>
          <table:table-cell office:value-type="string" calcext:value-type="string">
            <text:p>VIPUL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580" calcext:value-type="float">
            <text:p>2022580</text:p>
          </table:table-cell>
          <table:table-cell office:value-type="string" calcext:value-type="string">
            <text:p>VISHAL KUMAR MAURYA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81" calcext:value-type="float">
            <text:p>2022581</text:p>
          </table:table-cell>
          <table:table-cell office:value-type="string" calcext:value-type="string">
            <text:p>VIVAN RANGRA</text:p>
          </table:table-cell>
          <table:table-cell office:value-type="string" calcext:value-type="string">
            <text:p>CSSS</text:p>
          </table:table-cell>
        </table:table-row>
        <table:table-row table:style-name="ro3">
          <table:table-cell office:value-type="float" office:value="2022582" calcext:value-type="float">
            <text:p>2022582</text:p>
          </table:table-cell>
          <table:table-cell office:value-type="string" calcext:value-type="string">
            <text:p>WARADE ATHARV ABHIJIT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77" calcext:value-type="float">
            <text:p>2022577</text:p>
          </table:table-cell>
          <table:table-cell office:value-type="string" calcext:value-type="string">
            <text:p>VIPUL VERM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85" calcext:value-type="float">
            <text:p>2022585</text:p>
          </table:table-cell>
          <table:table-cell office:value-type="string" calcext:value-type="string">
            <text:p>YASH AGARWAL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586" calcext:value-type="float">
            <text:p>2022586</text:p>
          </table:table-cell>
          <table:table-cell office:value-type="string" calcext:value-type="string">
            <text:p>YASH BHARDWAJ</text:p>
          </table:table-cell>
          <table:table-cell office:value-type="string" calcext:value-type="string">
            <text:p>CSD</text:p>
          </table:table-cell>
        </table:table-row>
        <table:table-row table:style-name="ro2">
          <table:table-cell office:value-type="float" office:value="2022587" calcext:value-type="float">
            <text:p>2022587</text:p>
          </table:table-cell>
          <table:table-cell office:value-type="string" calcext:value-type="string">
            <text:p>YASH GARG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2022588" calcext:value-type="float">
            <text:p>2022588</text:p>
          </table:table-cell>
          <table:table-cell office:value-type="string" calcext:value-type="string">
            <text:p>YASH GOYAL</text:p>
          </table:table-cell>
          <table:table-cell office:value-type="string" calcext:value-type="string">
            <text:p>CSAM</text:p>
          </table:table-cell>
        </table:table-row>
        <table:table-row table:style-name="ro2">
          <table:table-cell office:value-type="float" office:value="2022583" calcext:value-type="float">
            <text:p>2022583</text:p>
          </table:table-cell>
          <table:table-cell office:value-type="string" calcext:value-type="string">
            <text:p>WASIF ALI</text:p>
          </table:table-cell>
          <table:table-cell office:value-type="string" calcext:value-type="string">
            <text:p>CSE</text:p>
          </table:table-cell>
        </table:table-row>
        <table:table-row table:style-name="ro2">
          <table:table-cell office:value-type="float" office:value="2022590" calcext:value-type="float">
            <text:p>2022590</text:p>
          </table:table-cell>
          <table:table-cell office:value-type="string" calcext:value-type="string">
            <text:p>YASH SINHA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591" calcext:value-type="float">
            <text:p>2022591</text:p>
          </table:table-cell>
          <table:table-cell office:value-type="string" calcext:value-type="string">
            <text:p>YASHOVARDHAN SINGHAL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float" office:value="2022593" calcext:value-type="float">
            <text:p>2022593</text:p>
          </table:table-cell>
          <table:table-cell office:value-type="string" calcext:value-type="string">
            <text:p>YOGESH KUMAR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595" calcext:value-type="float">
            <text:p>2022595</text:p>
          </table:table-cell>
          <table:table-cell office:value-type="string" calcext:value-type="string">
            <text:p>NISHANT SINGH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596" calcext:value-type="float">
            <text:p>2022596</text:p>
          </table:table-cell>
          <table:table-cell office:value-type="string" calcext:value-type="string">
            <text:p>VIPUL MISHRA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594" calcext:value-type="float">
            <text:p>2022594</text:p>
          </table:table-cell>
          <table:table-cell office:value-type="string" calcext:value-type="string">
            <text:p>BHAVY CHAWLA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597" calcext:value-type="float">
            <text:p>2022597</text:p>
          </table:table-cell>
          <table:table-cell office:value-type="string" calcext:value-type="string">
            <text:p>ADITYA DHIMAN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598" calcext:value-type="float">
            <text:p>2022598</text:p>
          </table:table-cell>
          <table:table-cell office:value-type="string" calcext:value-type="string">
            <text:p>ADITYA KUMAR SINGH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599" calcext:value-type="float">
            <text:p>2022599</text:p>
          </table:table-cell>
          <table:table-cell office:value-type="string" calcext:value-type="string">
            <text:p>ADTIYA BAJIRAO KAMBLE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600" calcext:value-type="float">
            <text:p>2022600</text:p>
          </table:table-cell>
          <table:table-cell office:value-type="string" calcext:value-type="string">
            <text:p>BHANU PAL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2022601" calcext:value-type="float">
            <text:p>2022601</text:p>
          </table:table-cell>
          <table:table-cell office:value-type="string" calcext:value-type="string">
            <text:p>JASDEEP SINGH SANDHU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602" calcext:value-type="float">
            <text:p>2022602</text:p>
          </table:table-cell>
          <table:table-cell office:value-type="string" calcext:value-type="string">
            <text:p>NAMAN GARG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603" calcext:value-type="float">
            <text:p>2022603</text:p>
          </table:table-cell>
          <table:table-cell office:value-type="string" calcext:value-type="string">
            <text:p>SHASHANK MISHRA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float" office:value="2022604" calcext:value-type="float">
            <text:p>2022604</text:p>
          </table:table-cell>
          <table:table-cell office:value-type="string" calcext:value-type="string">
            <text:p>VUPPU PRAGATHI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605" calcext:value-type="float">
            <text:p>2022605</text:p>
          </table:table-cell>
          <table:table-cell office:value-type="string" calcext:value-type="string">
            <text:p>ADITYA CHAUHAN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606" calcext:value-type="float">
            <text:p>2022606</text:p>
          </table:table-cell>
          <table:table-cell office:value-type="string" calcext:value-type="string">
            <text:p>VASHU</text:p>
          </table:table-cell>
          <table:table-cell office:value-type="string" calcext:value-type="string">
            <text:p>CSAI</text:p>
          </table:table-cell>
        </table:table-row>
        <table:table-row table:style-name="ro1">
          <table:table-cell office:value-type="float" office:value="2022607" calcext:value-type="float">
            <text:p>2022607</text:p>
          </table:table-cell>
          <table:table-cell office:value-type="string" calcext:value-type="string">
            <text:p>MARAM TEJASWI</text:p>
          </table:table-cell>
          <table:table-cell office:value-type="string" calcext:value-type="string">
            <text:p>EVE</text:p>
          </table:table-cell>
        </table:table-row>
        <table:table-row table:style-name="ro2">
          <table:table-cell office:value-type="float" office:value="2022589" calcext:value-type="float">
            <text:p>2022589</text:p>
          </table:table-cell>
          <table:table-cell office:value-type="string" calcext:value-type="string">
            <text:p>YASH SINGH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022609" calcext:value-type="float">
            <text:p>2022609</text:p>
          </table:table-cell>
          <table:table-cell office:value-type="string" calcext:value-type="string">
            <text:p>VAISHVI VERM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610" calcext:value-type="float">
            <text:p>2022610</text:p>
          </table:table-cell>
          <table:table-cell office:value-type="string" calcext:value-type="string">
            <text:p>KUNAL SHARMA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float" office:value="2022611" calcext:value-type="float">
            <text:p>2022611</text:p>
          </table:table-cell>
          <table:table-cell office:value-type="string" calcext:value-type="string">
            <text:p>KANAK YADAV</text:p>
          </table:table-cell>
          <table:table-cell office:value-type="string" calcext:value-type="string">
            <text:p>CSAM</text:p>
          </table:table-cell>
        </table:table-row>
        <table:table-row table:style-name="ro1">
          <table:table-cell office:value-type="float" office:value="2022612" calcext:value-type="float">
            <text:p>2022612</text:p>
          </table:table-cell>
          <table:table-cell office:value-type="string" calcext:value-type="string">
            <text:p>TANISHK SINGH</text:p>
          </table:table-cell>
          <table:table-cell office:value-type="string" calcext:value-type="string">
            <text:p>CSSS</text:p>
          </table:table-cell>
        </table:table-row>
        <table:table-row table:style-name="ro1">
          <table:table-cell office:value-type="float" office:value="2022592" calcext:value-type="float">
            <text:p>2022592</text:p>
          </table:table-cell>
          <table:table-cell office:value-type="string" calcext:value-type="string">
            <text:p>YATIN RATHORE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608" calcext:value-type="float">
            <text:p>2022608</text:p>
          </table:table-cell>
          <table:table-cell office:value-type="string" calcext:value-type="string">
            <text:p>AYUSH VIKRAM SINGH</text:p>
          </table:table-cell>
          <table:table-cell office:value-type="string" calcext:value-type="string">
            <text:p>CSE</text:p>
          </table:table-cell>
        </table:table-row>
        <table:table-row table:style-name="ro3">
          <table:table-cell office:value-type="float" office:value="2022613" calcext:value-type="float">
            <text:p>2022613</text:p>
          </table:table-cell>
          <table:table-cell office:value-type="string" calcext:value-type="string">
            <text:p>TAMIM CHOWDHURY</text:p>
          </table:table-cell>
          <table:table-cell office:value-type="string" calcext:value-type="string">
            <text:p>C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9:39:10.646140840</meta:creation-date>
    <dc:date>2026-01-23T19:41:13.394782372</dc:date>
    <meta:editing-duration>PT2M4S</meta:editing-duration>
    <meta:editing-cycles>1</meta:editing-cycles>
    <meta:generator>LibreOffice/24.2.7.2$Linux_X86_64 LibreOffice_project/420$Build-2</meta:generator>
    <meta:document-statistic meta:table-count="1" meta:cell-count="1767" meta:object-count="0"/>
  </office:meta>
</office:document-meta>
</file>